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22000001E040A81AED.png" manifest:media-type="image/png"/>
  <manifest:file-entry manifest:full-path="Pictures/1000000100000320000001C3ED20F732.png" manifest:media-type="image/png"/>
  <manifest:file-entry manifest:full-path="Pictures/10000001000002B1000001B8B0F5E43D.png" manifest:media-type="image/png"/>
  <manifest:file-entry manifest:full-path="Pictures/10000000000005000000040037302F48.jpg" manifest:media-type="image/jpeg"/>
  <manifest:file-entry manifest:full-path="Pictures/100000010000077F000003712F9B74B6.png" manifest:media-type="image/png"/>
  <manifest:file-entry manifest:full-path="Pictures/100000010000077E0000025F42403837.png" manifest:media-type="image/png"/>
  <manifest:file-entry manifest:full-path="Pictures/10000000000009C4000007FDD57F4ACF.jpg" manifest:media-type="image/jpeg"/>
  <manifest:file-entry manifest:full-path="Pictures/10000000000009C4000006827CD3279B.jpg" manifest:media-type="image/jpeg"/>
  <manifest:file-entry manifest:full-path="Pictures/1000000000000264000002645CAEB01D.jpg" manifest:media-type="image/jpeg"/>
  <manifest:file-entry manifest:full-path="Pictures/10000000000009C4000006852401EA8E.jpg" manifest:media-type="image/jpeg"/>
  <manifest:file-entry manifest:full-path="Pictures/10000000000004AF000004B0F51973FA.jpg" manifest:media-type="image/jpeg"/>
  <manifest:file-entry manifest:full-path="Pictures/10000000000009C40000060C6632020B.jpg" manifest:media-type="image/jpeg"/>
  <manifest:file-entry manifest:full-path="Pictures/10000001000003A80000023DA47B4F51.png" manifest:media-type="image/png"/>
  <manifest:file-entry manifest:full-path="Pictures/10000000000009C400000682CD22342F.jpg" manifest:media-type="image/jpeg"/>
  <manifest:file-entry manifest:full-path="Pictures/10000001000003A50000024DC0355A97.png" manifest:media-type="image/png"/>
  <manifest:file-entry manifest:full-path="Pictures/10000001000001AC0000025A6DED93A5.png" manifest:media-type="image/png"/>
  <manifest:file-entry manifest:full-path="Pictures/100000000000011C000000B3AEBDB8BA.jpg" manifest:media-type="image/jpeg"/>
  <manifest:file-entry manifest:full-path="Pictures/10000001000002AB000001B71CC677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Franklin Gothic Medium" svg:font-family="'Franklin Gothic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Screenshot_25_202026-02-22_25_20103454" style:repeat="stretch" presentation:display-footer="true" presentation:display-page-number="false" presentation:display-date-time="true" smil:type="miscShapeWipe" smil:subtype="across"/>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cm" svg:stroke-color="#000000" draw:marker-start-width="0.35cm" draw:marker-end-width="0.35cm" draw:fill="solid" draw:fill-color="#1b1b1e" draw:textarea-horizontal-align="justify" draw:textarea-vertical-align="middle" draw:auto-grow-height="false" fo:min-height="11.65cm" fo:min-width="25.9cm" fo:padding-top="0.175cm" fo:padding-bottom="0.175cm" fo:padding-left="0.3cm" fo:padding-right="0.3cm" loext:decorative="false"/>
    </style:style>
    <style:style style:name="gr2" style:family="graphic" style:parent-style-name="Object_20_with_20_no_20_fill_20_and_20_no_20_line">
      <style:graphic-properties draw:stroke="none" svg:stroke-width="0cm" draw:marker-start-width="0.2cm" draw:marker-end-width="0.2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draw:textarea-horizontal-align="right" fo:min-height="0.883cm" loext:decorative="false"/>
      <style:paragraph-properties style:writing-mode="lr-tb"/>
    </style:style>
    <style:style style:name="gr5" style:family="graphic" style:parent-style-name="objectwithoutfill">
      <style:graphic-properties draw:stroke="solid" svg:stroke-width="0.1cm" draw:marker-start-width="0.35cm" draw:marker-end-width="0.35cm" draw:fill="none" draw:textarea-vertical-align="middle" fo:padding-top="0.175cm" fo:padding-bottom="0.175cm" fo:padding-left="0.3cm" fo:padding-right="0.3cm" loext:decorative="false"/>
    </style:style>
    <style:style style:name="gr6" style:family="graphic" style:parent-style-name="objectwithoutfill">
      <style:graphic-properties draw:stroke="solid" svg:stroke-width="0.1cm" svg:stroke-color="#dc99d2" draw:marker-start-width="0.35cm" draw:marker-end-width="0.35cm" draw:fill="solid" draw:fill-color="#dc99d2" draw:textarea-vertical-align="middle" fo:padding-top="0.175cm" fo:padding-bottom="0.175cm" fo:padding-left="0.3cm" fo:padding-right="0.3cm" loext:decorative="false"/>
    </style:style>
    <style:style style:name="gr7" style:family="graphic">
      <style:graphic-properties style:protect="size" loext:decorative="false"/>
    </style:style>
    <style:style style:name="gr8" style:family="graphic" style:parent-style-name="standard">
      <style:graphic-properties draw:stroke="solid" svg:stroke-width="0.1cm" svg:stroke-color="#000000" draw:marker-start-width="0.35cm" draw:marker-end-width="0.35cm" draw:fill="solid" draw:fill-color="#1b1b1e" draw:textarea-horizontal-align="justify" draw:textarea-vertical-align="middle" draw:auto-grow-height="false" fo:min-height="11.65cm" fo:min-width="25cm" fo:padding-top="0.175cm" fo:padding-bottom="0.175cm" fo:padding-left="0.3cm" fo:padding-right="0.3cm" loext:decorative="false"/>
    </style:style>
    <style:style style:name="gr9"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2.65cm" fo:min-width="9.7cm" fo:padding-top="0.175cm" fo:padding-bottom="0.175cm" fo:padding-left="0.3cm" fo:padding-right="0.3cm" loext:decorative="false"/>
    </style:style>
    <style:style style:name="gr10" style:family="graphic" style:parent-style-name="standard">
      <style:graphic-properties draw:stroke="none" draw:fill="none" fo:min-height="2.237cm" loext:decorative="false"/>
      <style:paragraph-properties style:writing-mode="lr-tb"/>
    </style:style>
    <style:style style:name="gr11"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913cm, 0cm, 23.537cm)" draw:image-opacity="100%" style:mirror="none" loext:decorative="false"/>
    </style:style>
    <style:style style:name="gr12"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281cm, 14.021cm, 4.865cm, 13.129cm)" draw:image-opacity="100%" style:mirror="none" loext:decorative="false"/>
    </style:style>
    <style:style style:name="gr13" style:family="graphic" style:parent-style-name="standard">
      <style:graphic-properties draw:stroke="solid" svg:stroke-width="0.1cm" svg:stroke-color="#000000" draw:marker-start-width="0.35cm" draw:marker-end-width="0.35cm" draw:fill="solid" draw:fill-color="#1b1b1e" draw:textarea-horizontal-align="justify" draw:textarea-vertical-align="middle" draw:auto-grow-height="false" fo:min-height="12.15cm" fo:min-width="25cm" fo:padding-top="0.175cm" fo:padding-bottom="0.175cm" fo:padding-left="0.3cm" fo:padding-right="0.3cm" loext:decorative="false"/>
    </style:style>
    <style:style style:name="gr14"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6.665cm, 0cm, 16.665cm)" draw:image-opacity="100%" style:mirror="none" loext:decorative="false"/>
    </style:style>
    <style:style style:name="gr15"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5cm" fo:min-width="12.9cm" fo:padding-top="0.175cm" fo:padding-bottom="0.175cm" fo:padding-left="0.3cm" fo:padding-right="0.3cm" loext:decorative="false"/>
    </style:style>
    <style:style style:name="gr16"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15cm" fo:min-width="12.9cm" fo:padding-top="0.175cm" fo:padding-bottom="0.175cm" fo:padding-left="0.3cm" fo:padding-right="0.3cm" loext:decorative="false"/>
    </style:style>
    <style:style style:name="gr17"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cm" fo:min-width="12.9cm" fo:padding-top="0.175cm" fo:padding-bottom="0.175cm" fo:padding-left="0.3cm" fo:padding-right="0.3cm" loext:decorative="false"/>
    </style:style>
    <style:style style:name="gr1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1.487cm, 0cm)" draw:image-opacity="100%" style:mirror="none" loext:decorative="false"/>
    </style:style>
    <style:style style:name="gr19"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3.35cm" fo:min-width="7.7cm" fo:padding-top="0.175cm" fo:padding-bottom="0.175cm" fo:padding-left="0.3cm" fo:padding-right="0.3cm" loext:decorative="false"/>
    </style:style>
    <style:style style:name="gr20" style:family="graphic" style:parent-style-name="standard">
      <style:graphic-properties draw:stroke="none" draw:fill="none" fo:min-height="3.097cm" loext:decorative="false"/>
      <style:paragraph-properties style:writing-mode="lr-tb"/>
    </style:style>
    <style:style style:name="gr21"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7.727cm, 0cm, 17.727cm)" draw:image-opacity="100%" style:mirror="none" loext:decorative="false"/>
    </style:style>
    <style:style style:name="gr22" style:family="graphic" style:parent-style-name="Object_20_with_20_no_20_fill_20_and_20_no_20_line">
      <style:graphic-properties draw:stroke="solid" draw:stroke-dash="Dot" svg:stroke-width="0.1cm" draw:marker-start-width="0.35cm" draw:marker-end-width="0.35cm" svg:stroke-linecap="butt"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732cm, 0cm, 17.052cm)" draw:image-opacity="100%" style:mirror="none" loext:decorative="false"/>
    </style:style>
    <style:style style:name="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723cm, 0cm)" draw:image-opacity="100%" style:mirror="none" loext:decorative="false"/>
    </style:style>
    <style:style style:name="gr24"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8.55cm" fo:min-width="9.2cm" fo:padding-top="0.175cm" fo:padding-bottom="0.175cm" fo:padding-left="0.3cm" fo:padding-right="0.3cm" loext:decorative="false"/>
    </style:style>
    <style:style style:name="gr25" style:family="graphic" style:parent-style-name="standard">
      <style:graphic-properties draw:stroke="none" draw:fill="none" fo:min-height="7.741cm" loext:decorative="false"/>
      <style:paragraph-properties style:writing-mode="lr-tb"/>
    </style:style>
    <style:style style:name="gr2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299cm, 0cm, 2.3cm, 0cm)" draw:image-opacity="100%" style:mirror="none" loext:decorative="false"/>
    </style:style>
    <style:style style:name="gr27" style:family="graphic" style:parent-style-name="standard">
      <style:graphic-properties draw:stroke="none" draw:fill="none" fo:min-height="0.963cm" loext:decorative="false"/>
      <style:paragraph-properties style:writing-mode="lr-tb"/>
    </style:style>
    <style:style style:name="gr28" style:family="graphic" style:parent-style-name="standard">
      <style:graphic-properties draw:stroke="none" draw:fill="none" fo:min-height="2.416cm" loext:decorative="false"/>
      <style:paragraph-properties style:writing-mode="lr-tb"/>
    </style:style>
    <style:style style:name="gr29" style:family="graphic" style:parent-style-name="standard">
      <style:graphic-properties draw:stroke="solid" svg:stroke-width="0.1cm" svg:stroke-color="#000000" draw:marker-start-width="0.35cm" draw:marker-end-width="0.35cm" draw:fill="solid" draw:fill-color="#1b1b1e" draw:textarea-horizontal-align="justify" draw:textarea-vertical-align="middle" draw:auto-grow-height="false" fo:min-height="7.15cm" fo:min-width="25.9cm" fo:padding-top="0.175cm" fo:padding-bottom="0.175cm" fo:padding-left="0.3cm" fo:padding-right="0.3cm" loext:decorative="false"/>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subtitle">
      <style:graphic-properties draw:fill-color="#ffffff" draw:auto-grow-height="true" fo:min-height="3cm" loext:decorative="false"/>
      <style:paragraph-properties style:writing-mode="lr-tb"/>
    </style:style>
    <style:style style:name="pr3" style:family="presentation" style:parent-style-name="Default-subtitle">
      <style:graphic-properties draw:fill-color="#ffffff" draw:textarea-vertical-align="top" draw:auto-grow-height="true" fo:min-height="4.643cm" loext:decorative="false"/>
      <style:paragraph-properties style:writing-mode="lr-tb"/>
    </style:style>
    <style:style style:name="pr4" style:family="presentation" style:parent-style-name="Default-subtitle">
      <style:graphic-properties draw:fill-color="#ffffff" draw:textarea-vertical-align="top" draw:auto-grow-height="true" fo:min-height="0.8cm" loext:decorative="false"/>
      <style:paragraph-properties style:writing-mode="lr-tb"/>
    </style:style>
    <style:style style:name="pr5" style:family="presentation" style:parent-style-name="Default-notes">
      <style:graphic-properties draw:fill-color="#ffffff" draw:auto-grow-height="true" fo:min-height="12.572cm" loext:decorative="false"/>
      <style:paragraph-properties style:writing-mode="lr-tb"/>
    </style:style>
    <style:style style:name="pr6" style:family="presentation" style:parent-style-name="Default-title">
      <style:graphic-properties draw:auto-grow-height="true" fo:min-height="1.772cm" loext:decorative="false"/>
      <style:paragraph-properties style:writing-mode="lr-tb"/>
    </style:style>
    <style:style style:name="pr7" style:family="presentation" style:parent-style-name="Default-subtitle" style:list-style-name="L1">
      <style:graphic-properties draw:fill-color="#ffffff" draw:auto-grow-height="true" fo:min-height="8.439cm" loext:decorative="false"/>
      <style:paragraph-properties style:writing-mode="lr-tb"/>
    </style:style>
    <style:style style:name="pr8" style:family="presentation" style:parent-style-name="Default-subtitle" style:list-style-name="L1">
      <style:graphic-properties draw:fill-color="#ffffff" draw:textarea-vertical-align="top" draw:auto-grow-height="true" fo:min-height="8.439cm" loext:decorative="false"/>
      <style:paragraph-properties style:writing-mode="lr-tb"/>
    </style:style>
    <style:style style:name="pr9" style:family="presentation" style:parent-style-name="Default-subtitle" style:list-style-name="L1">
      <style:graphic-properties draw:fill-color="#ffffff" draw:textarea-vertical-align="top" draw:auto-grow-height="true" fo:min-height="1.279cm" loext:decorative="false"/>
      <style:paragraph-properties style:writing-mode="lr-tb"/>
    </style:style>
    <style:style style:name="pr10" style:family="presentation" style:parent-style-name="Default-subtitle" style:list-style-name="L1">
      <style:graphic-properties draw:fill-color="#ffffff" draw:textarea-vertical-align="top" draw:auto-grow-height="true" fo:min-height="6.401cm" loext:decorative="false"/>
      <style:paragraph-properties style:writing-mode="lr-tb"/>
    </style:style>
    <style:style style:name="pr11"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2" style:family="presentation" style:parent-style-name="Default-title">
      <style:graphic-properties draw:auto-grow-height="true" fo:min-height="1.284cm" loext:decorative="false"/>
      <style:paragraph-properties style:writing-mode="lr-tb"/>
    </style:style>
    <style:style style:name="pr13"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4"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5" style:family="presentation" style:parent-style-name="Default-title">
      <style:graphic-properties draw:auto-grow-height="true" fo:min-height="3.363cm" loext:decorative="false"/>
      <style:paragraph-properties style:writing-mode="lr-tb"/>
    </style:style>
    <style:style style:name="pr16"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7" style:family="presentation" style:parent-style-name="Default-title">
      <style:graphic-properties draw:auto-grow-height="true" fo:min-height="5.133cm" loext:decorative="false"/>
      <style:paragraph-properties style:writing-mode="lr-tb"/>
    </style:style>
    <style:style style:name="pr18"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9"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20"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21" style:family="presentation" style:parent-style-name="Default-subtitle" style:list-style-name="L1">
      <style:graphic-properties draw:fill-color="#ffffff" draw:textarea-vertical-align="top" draw:auto-grow-height="true" fo:min-height="7.03cm" loext:decorative="false"/>
      <style:paragraph-properties style:writing-mode="lr-tb"/>
    </style:style>
    <style:style style:name="pr22" style:family="presentation" style:parent-style-name="Default-title">
      <style:graphic-properties draw:auto-grow-height="true" fo:min-height="1.533cm" loext:decorative="false"/>
      <style:paragraph-properties style:writing-mode="lr-tb"/>
    </style:style>
    <style:style style:name="pr23" style:family="presentation" style:parent-style-name="Default-subtitle" style:list-style-name="L1">
      <style:graphic-properties draw:fill-color="#ffffff" draw:textarea-vertical-align="top" draw:auto-grow-height="true" fo:min-height="7.121cm" loext:decorative="false"/>
      <style:paragraph-properties style:writing-mode="lr-tb"/>
    </style:style>
    <style:style style:name="pr24" style:family="presentation" style:parent-style-name="Default-subtitle" style:list-style-name="L1">
      <style:graphic-properties draw:fill-color="#ffffff" draw:textarea-vertical-align="top" draw:auto-grow-height="true" fo:min-height="7.121cm" loext:decorative="false"/>
      <style:paragraph-properties style:writing-mode="lr-tb"/>
    </style:style>
    <style:style style:name="pr25" style:family="presentation" style:parent-style-name="Default-subtitle" style:list-style-name="L1">
      <style:graphic-properties draw:fill-color="#ffffff" draw:textarea-vertical-align="top" draw:auto-grow-height="true" fo:min-height="7.348cm" loext:decorative="false"/>
      <style:paragraph-properties style:writing-mode="lr-tb"/>
    </style:style>
    <style:style style:name="pr26"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27" style:family="presentation" style:parent-style-name="Default-subtitle" style:list-style-name="L2">
      <style:graphic-properties draw:fill-color="#ffffff" draw:textarea-vertical-align="top" draw:auto-grow-height="true" fo:min-height="7.863cm" loext:decorative="false"/>
      <style:paragraph-properties style:writing-mode="lr-tb"/>
    </style:style>
    <style:style style:name="pr28" style:family="presentation" style:parent-style-name="Default-subtitle" style:list-style-name="L1">
      <style:graphic-properties draw:fill-color="#ffffff" draw:textarea-vertical-align="top" draw:auto-grow-height="true" fo:min-height="2.557cm" loext:decorative="false"/>
      <style:paragraph-properties style:writing-mode="lr-tb"/>
    </style:style>
    <style:style style:name="pr29"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30"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31" style:family="presentation" style:parent-style-name="Default-subtitle" style:list-style-name="L1">
      <style:graphic-properties draw:fill-color="#ffffff" draw:textarea-vertical-align="top" draw:auto-grow-height="true" fo:min-height="4.863cm" loext:decorative="false"/>
      <style:paragraph-properties style:writing-mode="lr-tb"/>
    </style:style>
    <style:style style:name="pr32"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33"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34" style:family="presentation" style:parent-style-name="Default-title">
      <style:graphic-properties draw:auto-grow-height="true" fo:min-height="1.682cm" loext:decorative="false"/>
      <style:paragraph-properties style:writing-mode="lr-tb"/>
    </style:style>
    <style:style style:name="pr35" style:family="presentation" style:parent-style-name="Default-subtitle" style:list-style-name="L1">
      <style:graphic-properties draw:fill-color="#ffffff" draw:textarea-vertical-align="top" draw:auto-grow-height="true" fo:min-height="1.839cm" loext:decorative="false"/>
      <style:paragraph-properties style:writing-mode="lr-tb"/>
    </style:style>
    <style:style style:name="pr36" style:family="presentation" style:parent-style-name="Default-subtitle" style:list-style-name="L1">
      <style:graphic-properties draw:fill-color="#ffffff" draw:textarea-vertical-align="top" draw:auto-grow-height="true" fo:min-height="9.016cm" loext:decorative="false"/>
      <style:paragraph-properties style:writing-mode="lr-tb"/>
    </style:style>
    <style:style style:name="pr37" style:family="presentation" style:parent-style-name="Default-subtitle" style:list-style-name="L1">
      <style:graphic-properties draw:fill-color="#ffffff" draw:textarea-vertical-align="top" draw:auto-grow-height="true" fo:min-height="9.016cm" loext:decorative="false"/>
      <style:paragraph-properties style:writing-mode="lr-tb"/>
    </style:style>
    <style:style style:name="pr38" style:family="presentation" style:parent-style-name="Default-subtitle" style:list-style-name="L1">
      <style:graphic-properties draw:fill-color="#ffffff" draw:textarea-vertical-align="top" draw:auto-grow-height="true" fo:min-height="2.557cm" loext:decorative="false"/>
      <style:paragraph-properties style:writing-mode="lr-tb"/>
    </style:style>
    <style:style style:name="pr39"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40" style:family="presentation" style:parent-style-name="Default-subtitle" style:list-style-name="L1">
      <style:graphic-properties draw:fill-color="#ffffff" draw:textarea-vertical-align="top" draw:auto-grow-height="true" fo:min-height="3.974cm" loext:decorative="false"/>
      <style:paragraph-properties style:writing-mode="lr-tb"/>
    </style:style>
    <style:style style:name="pr41"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42" style:family="presentation" style:parent-style-name="Default-subtitle" style:list-style-name="L1">
      <style:graphic-properties draw:fill-color="#ffffff" draw:textarea-vertical-align="top" draw:auto-grow-height="true" fo:min-height="7.268cm" loext:decorative="false"/>
      <style:paragraph-properties style:writing-mode="lr-tb"/>
    </style:style>
    <style:style style:name="pr43" style:family="presentation" style:parent-style-name="Default-title">
      <style:graphic-properties draw:auto-grow-height="true" fo:min-height="1.719cm" loext:decorative="false"/>
      <style:paragraph-properties style:writing-mode="lr-tb"/>
    </style:style>
    <style:style style:name="pr44" style:family="presentation" style:parent-style-name="Default-subtitle" style:list-style-name="L1">
      <style:graphic-properties draw:fill-color="#ffffff" draw:textarea-vertical-align="top" draw:auto-grow-height="true" fo:min-height="2.313cm" loext:decorative="false"/>
      <style:paragraph-properties style:writing-mode="lr-tb"/>
    </style:style>
    <style:style style:name="pr45" style:family="presentation" style:parent-style-name="Default-title">
      <style:graphic-properties draw:auto-grow-height="true" fo:min-height="1.943cm" loext:decorative="false"/>
      <style:paragraph-properties style:writing-mode="lr-tb"/>
    </style:style>
    <style:style style:name="pr46" style:family="presentation" style:parent-style-name="Default-subtitle" style:list-style-name="L1">
      <style:graphic-properties draw:fill-color="#ffffff" draw:textarea-vertical-align="top" draw:auto-grow-height="true" fo:min-height="2.641cm" loext:decorative="false"/>
      <style:paragraph-properties style:writing-mode="lr-tb"/>
    </style:style>
    <style:style style:name="pr47" style:family="presentation" style:parent-style-name="Default-subtitle" style:list-style-name="L1">
      <style:graphic-properties draw:fill-color="#ffffff" draw:textarea-vertical-align="top" draw:auto-grow-height="true" fo:min-height="7.661cm" loext:decorative="false"/>
      <style:paragraph-properties style:writing-mode="lr-tb"/>
    </style:style>
    <style:style style:name="pr48" style:family="presentation" style:parent-style-name="Default-subtitle" style:list-style-name="L1">
      <style:graphic-properties draw:fill-color="#ffffff" draw:textarea-vertical-align="top" draw:auto-grow-height="true" fo:min-height="1.439cm" loext:decorative="false"/>
      <style:paragraph-properties style:writing-mode="lr-tb"/>
    </style:style>
    <style:style style:name="pr49" style:family="presentation" style:parent-style-name="Default-subtitle" style:list-style-name="L1">
      <style:graphic-properties draw:fill-color="#ffffff" draw:textarea-vertical-align="top" draw:auto-grow-height="true" fo:min-height="6.376cm" loext:decorative="false"/>
      <style:paragraph-properties style:writing-mode="lr-tb"/>
    </style:style>
    <style:style style:name="pr50" style:family="presentation" style:parent-style-name="Default-subtitle" style:list-style-name="L1">
      <style:graphic-properties draw:fill-color="#ffffff" draw:textarea-vertical-align="top" draw:auto-grow-height="true" fo:min-height="1.804cm" loext:decorative="false"/>
      <style:paragraph-properties style:writing-mode="lr-tb"/>
    </style:style>
    <style:style style:name="pr51"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52"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53" style:family="presentation" style:parent-style-name="Default-subtitle" style:list-style-name="L1">
      <style:graphic-properties draw:fill-color="#ffffff" draw:textarea-vertical-align="top" draw:auto-grow-height="true" fo:min-height="8.953cm" loext:decorative="false"/>
      <style:paragraph-properties style:writing-mode="lr-tb"/>
    </style:style>
    <style:style style:name="pr54" style:family="presentation" style:parent-style-name="Default-subtitle">
      <style:graphic-properties draw:fill-color="#ffffff" draw:auto-grow-height="true" fo:min-height="6.168cm" loext:decorative="false"/>
      <style:paragraph-properties style:writing-mode="lr-tb"/>
    </style:style>
    <style:style style:name="P1" style:family="paragraph">
      <loext:graphic-properties draw:fill="solid" draw:fill-color="#1b1b1e"/>
      <style:paragraph-properties fo:text-align="center"/>
    </style:style>
    <style:style style:name="P2" style:family="paragraph">
      <loext:graphic-properties draw:fill="none"/>
      <style:paragraph-properties fo:text-align="center"/>
    </style:style>
    <style:style style:name="P3" style:family="paragraph">
      <style:text-properties fo:color="#ffffff" loext:opacity="100%" style:font-name="Franklin Gothic Medium" fo:font-size="54pt" style:font-size-asian="54pt" style:font-size-complex="54pt"/>
    </style:style>
    <style:style style:name="P4" style:family="paragraph">
      <style:paragraph-properties fo:text-align="center"/>
    </style:style>
    <style:style style:name="P5" style:family="paragraph">
      <loext:graphic-properties draw:fill-color="#ffffff"/>
      <style:paragraph-properties fo:text-align="center"/>
      <style:text-properties fo:color="#282b20" loext:opacity="100%" style:font-name="Franklin Gothic Medium" fo:font-size="24pt" style:font-size-asian="24pt" style:font-size-complex="24pt"/>
    </style:style>
    <style:style style:name="P6" style:family="paragraph">
      <loext:graphic-properties draw:fill="none"/>
      <style:paragraph-properties fo:text-align="start"/>
      <style:text-properties fo:font-size="18pt"/>
    </style:style>
    <style:style style:name="P7" style:family="paragraph">
      <style:paragraph-properties fo:text-align="start"/>
    </style:style>
    <style:style style:name="P8" style:family="paragraph">
      <loext:graphic-properties draw:fill-color="#ffffff"/>
      <style:paragraph-properties fo:text-align="start"/>
      <style:text-properties fo:color="#ffffff" loext:opacity="100%" style:font-name="Franklin Gothic Medium" fo:font-size="18pt" style:font-size-asian="18pt" style:font-size-complex="18pt"/>
    </style:style>
    <style:style style:name="P9" style:family="paragraph">
      <style:paragraph-properties fo:text-align="end"/>
    </style:style>
    <style:style style:name="P10" style:family="paragraph">
      <loext:graphic-properties draw:fill="none"/>
      <style:paragraph-properties fo:text-align="end"/>
      <style:text-properties fo:color="#a9c0e8" loext:opacity="100%" fo:font-size="18pt"/>
    </style:style>
    <style:style style:name="P11" style:family="paragraph">
      <loext:graphic-properties draw:fill-color="#ffffff"/>
      <style:paragraph-properties fo:text-align="end"/>
      <style:text-properties fo:color="#ffffff" loext:opacity="100%" style:font-name="Franklin Gothic Medium" fo:font-size="18pt" style:font-size-asian="18pt" style:font-size-complex="18pt"/>
    </style:style>
    <style:style style:name="P12" style:family="paragraph">
      <loext:graphic-properties draw:fill="solid" draw:fill-color="#dc99d2"/>
      <style:paragraph-properties fo:text-align="center"/>
      <style:text-properties fo:color="#dc99d2" loext:opacity="100%"/>
    </style:style>
    <style:style style:name="P13" style:family="paragraph">
      <loext:graphic-properties draw:fill-color="#ffffff"/>
    </style:style>
    <style:style style:name="P14" style:family="paragraph">
      <style:paragraph-properties fo:text-align="start"/>
      <style:text-properties fo:color="#ffffff" loext:opacity="100%" style:font-name="Franklin Gothic Medium" fo:font-size="42pt" style:font-size-asian="42pt" style:font-size-complex="42pt"/>
    </style:style>
    <style:style style:name="P15" style:family="paragraph">
      <style:paragraph-properties fo:margin-left="0cm" fo:margin-right="0cm" fo:text-align="start" fo:text-indent="0cm"/>
    </style:style>
    <style:style style:name="P16" style:family="paragraph">
      <style:paragraph-properties fo:margin-left="0cm" fo:margin-right="0cm" fo:margin-top="0.42cm" fo:margin-bottom="0.35cm" fo:text-align="start" fo:text-indent="0cm"/>
    </style:style>
    <style:style style:name="P17" style:family="paragraph">
      <loext:graphic-properties draw:fill-color="#ffffff"/>
      <style:paragraph-properties fo:margin-left="0cm" fo:margin-right="0cm" fo:text-align="start" fo:text-indent="0cm"/>
      <style:text-properties fo:color="#ffffff" loext:opacity="100%" style:font-name="Franklin Gothic Medium" fo:font-size="18pt" style:font-size-asian="18pt" style:font-size-complex="18pt"/>
    </style:style>
    <style:style style:name="P18" style:family="paragraph">
      <loext:graphic-properties draw:fill="solid" draw:fill-color="#1b1b1e"/>
      <style:paragraph-properties fo:text-align="center"/>
      <style:text-properties fo:color="#000000" loext:opacity="100%"/>
    </style:style>
    <style:style style:name="P19" style:family="paragraph">
      <loext:graphic-properties draw:fill-color="#ffffff"/>
      <style:paragraph-properties fo:margin-left="0cm" fo:margin-right="0cm" fo:text-align="start" fo:text-indent="0cm"/>
      <style:text-properties fo:color="#ffffff" loext:opacity="100%" style:font-name="Franklin Gothic Medium" fo:font-size="16pt" style:font-size-asian="16pt" style:font-size-complex="16pt"/>
    </style:style>
    <style:style style:name="P20" style:family="paragraph">
      <loext:graphic-properties draw:fill-color="#ffffff"/>
      <style:paragraph-properties fo:margin-left="0cm" fo:margin-right="0cm" fo:text-align="start" fo:text-indent="0cm"/>
      <style:text-properties fo:color="#282b20" loext:opacity="100%" style:font-name="Franklin Gothic Medium" fo:font-size="16pt" style:font-size-asian="16pt" style:font-size-complex="16pt"/>
    </style:style>
    <style:style style:name="P21" style:family="paragraph">
      <loext:graphic-properties draw:fill-color="#ffffff"/>
      <style:paragraph-properties fo:margin-left="0cm" fo:margin-right="0cm" fo:text-align="start" fo:text-indent="0cm"/>
      <style:text-properties fo:color="#ffffff" loext:opacity="100%" style:font-name="Franklin Gothic Medium" fo:font-size="20pt" style:font-size-asian="20pt" style:font-size-complex="20pt"/>
    </style:style>
    <style:style style:name="P22" style:family="paragraph">
      <loext:graphic-properties draw:fill-color="#815070"/>
      <style:paragraph-properties fo:text-align="center"/>
    </style:style>
    <style:style style:name="P23" style:family="paragraph">
      <loext:graphic-properties draw:fill="none"/>
      <style:paragraph-properties fo:text-align="end"/>
      <style:text-properties fo:color="#ffffff" loext:opacity="100%" style:font-name="Franklin Gothic Medium" fo:font-size="14pt" style:font-size-asian="12pt" style:font-size-complex="12pt"/>
    </style:style>
    <style:style style:name="P24" style:family="paragraph">
      <loext:graphic-properties draw:fill-color="#ffffff"/>
      <style:paragraph-properties fo:margin-left="0cm" fo:margin-right="0cm" fo:text-align="start" fo:text-indent="0cm"/>
      <style:text-properties fo:color="#ffffff" loext:opacity="100%" style:font-name="Franklin Gothic Medium" fo:font-size="15pt" style:font-size-asian="15pt" style:font-size-complex="15pt"/>
    </style:style>
    <style:style style:name="P25" style:family="paragraph">
      <style:paragraph-properties fo:text-align="start"/>
      <style:text-properties fo:color="#a9c0e8" loext:opacity="100%" style:font-name="Franklin Gothic Medium" fo:font-size="32pt" style:font-size-asian="32pt" style:font-size-complex="32pt"/>
    </style:style>
    <style:style style:name="P26" style:family="paragraph">
      <loext:graphic-properties draw:fill-color="#ffffff"/>
      <style:paragraph-properties fo:margin-left="0cm" fo:margin-right="0cm" fo:text-align="start" fo:text-indent="0cm"/>
      <style:text-properties fo:color="#e6ebf2" loext:opacity="100%" style:font-name="Franklin Gothic Medium" fo:font-size="13pt" style:font-size-asian="12pt" style:font-size-complex="12pt"/>
    </style:style>
    <style:style style:name="P27" style:family="paragraph">
      <loext:graphic-properties draw:fill-color="#ffffff"/>
      <style:text-properties fo:font-size="20pt"/>
    </style:style>
    <style:style style:name="P28" style:family="paragraph">
      <loext:graphic-properties draw:fill="none"/>
      <style:paragraph-properties fo:text-align="end"/>
      <style:text-properties fo:color="#ffffff" loext:opacity="100%" style:font-name="Franklin Gothic Medium" fo:font-size="12pt" style:font-size-asian="12pt" style:font-size-complex="12pt"/>
    </style:style>
    <style:style style:name="P29" style:family="paragraph">
      <loext:graphic-properties draw:fill-color="#ffffff"/>
      <style:paragraph-properties fo:margin-left="0cm" fo:margin-right="0cm" fo:text-align="start" fo:text-indent="0cm"/>
      <style:text-properties fo:color="#ffffff" loext:opacity="100%" style:font-name="Franklin Gothic Medium" fo:font-size="16pt" style:font-size-asian="17pt" style:font-size-complex="17pt"/>
    </style:style>
    <style:style style:name="P30" style:family="paragraph">
      <loext:graphic-properties draw:fill-color="#ffffff"/>
      <style:paragraph-properties fo:margin-left="0cm" fo:margin-right="0cm" fo:text-align="start" fo:text-indent="0cm"/>
      <style:text-properties fo:color="#ffffff" loext:opacity="100%" style:font-name="Franklin Gothic Medium" fo:font-size="14.8999996185303pt" style:font-size-asian="14.8999996185303pt" style:font-size-complex="14.8999996185303pt"/>
    </style:style>
    <style:style style:name="P31" style:family="paragraph">
      <loext:graphic-properties draw:fill-color="#ffffff"/>
      <style:paragraph-properties fo:margin-left="0cm" fo:margin-right="0cm" fo:text-align="start" fo:text-indent="0cm"/>
      <style:text-properties fo:color="#a9c0e8" loext:opacity="100%" style:font-name="Franklin Gothic Medium" fo:font-size="16pt" style:font-size-asian="16pt" style:font-size-complex="16pt"/>
    </style:style>
    <style:style style:name="P32" style:family="paragraph">
      <loext:graphic-properties draw:fill-color="#ffffff"/>
      <style:paragraph-properties fo:margin-left="0cm" fo:margin-right="0cm" fo:text-align="start" fo:text-indent="0cm"/>
      <style:text-properties fo:color="#ffffff" loext:opacity="100%" style:font-name="Franklin Gothic Medium" fo:font-size="14pt" style:font-size-asian="14pt" style:font-size-complex="14pt"/>
    </style:style>
    <style:style style:name="P33" style:family="paragraph">
      <loext:graphic-properties draw:fill-color="#ffffff"/>
      <style:paragraph-properties fo:margin-left="0cm" fo:margin-right="0cm" fo:text-align="start" fo:text-indent="0cm"/>
      <style:text-properties fo:color="#ffffff" loext:opacity="100%" style:font-name="Franklin Gothic Medium" fo:font-size="17pt" style:font-size-asian="17pt" style:font-size-complex="17pt"/>
    </style:style>
    <style:style style:name="P34" style:family="paragraph">
      <loext:graphic-properties draw:fill="none"/>
      <style:paragraph-properties fo:text-align="end"/>
      <style:text-properties fo:color="#ffffff" loext:opacity="100%" style:font-name="Franklin Gothic Medium" fo:font-size="13pt" style:font-size-asian="13pt" style:font-size-complex="13pt"/>
    </style:style>
    <style:style style:name="P35" style:family="paragraph">
      <style:paragraph-properties fo:margin-left="0cm" fo:margin-right="0cm" fo:text-align="start" fo:text-indent="0cm"/>
      <style:text-properties fo:font-size="12.5pt" style:font-size-asian="12.5pt" style:font-size-complex="12.5pt"/>
    </style:style>
    <style:style style:name="P36" style:family="paragraph">
      <loext:graphic-properties draw:fill-color="#ffffff"/>
      <style:paragraph-properties fo:margin-left="0cm" fo:margin-right="0cm" fo:text-align="start" fo:text-indent="0cm"/>
      <style:text-properties fo:color="#ffffff" loext:opacity="100%" style:font-name="Franklin Gothic Medium" fo:font-size="12.5pt" style:font-size-asian="12.5pt" style:font-size-complex="12.5pt"/>
    </style:style>
    <style:style style:name="P37" style:family="paragraph">
      <loext:graphic-properties draw:fill-color="#ffffff"/>
      <style:paragraph-properties fo:margin-left="0cm" fo:margin-right="0cm" fo:text-align="start" fo:text-indent="0cm"/>
      <style:text-properties fo:color="#ffffff" loext:opacity="100%" style:font-name="Franklin Gothic Medium" fo:font-size="14.8000001907349pt" style:font-size-asian="14.8000001907349pt" style:font-size-complex="14.8000001907349pt"/>
    </style:style>
    <style:style style:name="P38" style:family="paragraph">
      <loext:graphic-properties draw:fill-color="#ffffff"/>
      <style:paragraph-properties fo:margin-left="0cm" fo:margin-right="0cm" fo:margin-top="0.42cm" fo:margin-bottom="0.35cm" fo:text-align="start" fo:text-indent="0cm"/>
      <style:text-properties fo:color="#ffffff" loext:opacity="100%" style:font-name="Franklin Gothic Medium" fo:font-size="16.5pt" style:font-size-asian="16.5pt" style:font-size-complex="16.5pt"/>
    </style:style>
    <style:style style:name="P39" style:family="paragraph">
      <style:paragraph-properties fo:margin-left="0cm" fo:margin-right="0cm" fo:margin-top="0.42cm" fo:margin-bottom="0.35cm" fo:text-align="start" fo:text-indent="0cm"/>
      <style:text-properties fo:font-size="16pt" style:font-size-asian="16pt" style:font-size-complex="16pt"/>
    </style:style>
    <style:style style:name="P40" style:family="paragraph">
      <loext:graphic-properties draw:fill-color="#ffffff"/>
      <style:paragraph-properties fo:margin-left="0cm" fo:margin-right="0cm" fo:margin-top="0.42cm" fo:margin-bottom="0.35cm" fo:text-align="start" fo:text-indent="0cm"/>
      <style:text-properties fo:color="#ffffff" loext:opacity="100%" style:font-name="Franklin Gothic Medium" fo:font-size="16pt" style:font-size-asian="16pt" style:font-size-complex="16pt"/>
    </style:style>
    <style:style style:name="P41" style:family="paragraph">
      <loext:graphic-properties draw:fill="none"/>
    </style:style>
    <style:style style:name="P42" style:family="paragraph">
      <loext:graphic-properties draw:fill-color="#ffffff"/>
      <style:paragraph-properties fo:margin-left="0cm" fo:margin-right="0cm" fo:text-align="start" fo:text-indent="0cm"/>
      <style:text-properties fo:color="#a9c0e8" loext:opacity="100%" style:font-name="Franklin Gothic Medium" fo:font-size="15pt" style:font-size-asian="15pt" style:font-size-complex="15pt"/>
    </style:style>
    <style:style style:name="P43" style:family="paragraph">
      <loext:graphic-properties draw:fill-color="#ffffff"/>
      <style:paragraph-properties fo:margin-left="0cm" fo:margin-right="0cm" fo:text-align="start" fo:text-indent="0cm"/>
      <style:text-properties fo:color="#ffffff" loext:opacity="100%" style:font-name="Franklin Gothic Medium" fo:font-size="16pt" style:font-size-asian="15pt" style:font-size-complex="15pt"/>
    </style:style>
    <style:style style:name="P44" style:family="paragraph">
      <style:paragraph-properties fo:text-align="start"/>
      <style:text-properties fo:color="#ffffff" loext:opacity="100%" style:font-name="Franklin Gothic Medium" fo:font-size="40pt" style:font-size-asian="40pt" style:font-size-complex="40pt"/>
    </style:style>
    <style:style style:name="P45" style:family="paragraph">
      <loext:graphic-properties draw:fill-color="#ffffff"/>
      <style:paragraph-properties fo:text-align="center"/>
      <style:text-properties fo:color="#282b20" loext:opacity="100%" style:font-name="Franklin Gothic Medium" fo:font-size="22pt" style:font-size-asian="22pt" style:font-size-complex="22pt"/>
    </style:style>
    <style:style style:name="T1" style:family="text">
      <style:text-properties fo:color="#ffffff" loext:opacity="100%" style:font-name="Franklin Gothic Medium" fo:font-size="54pt" style:font-size-asian="54pt" style:font-size-complex="54pt"/>
    </style:style>
    <style:style style:name="T2" style:family="text">
      <style:text-properties fo:color="#ffffff" loext:opacity="100%" style:font-name="Franklin Gothic Medium" fo:font-size="20pt" style:font-size-asian="20pt" style:font-size-complex="20pt"/>
    </style:style>
    <style:style style:name="T3" style:family="text">
      <style:text-properties fo:color="#ffffff" loext:opacity="100%" style:font-name="Franklin Gothic Medium" fo:font-size="20pt" fo:font-style="italic" fo:font-weight="bold" style:font-size-asian="20pt" style:font-style-asian="italic" style:font-weight-asian="bold" style:font-size-complex="20pt" style:font-style-complex="italic" style:font-weight-complex="bold"/>
    </style:style>
    <style:style style:name="T4" style:family="text">
      <style:text-properties fo:color="#ffffff" loext:opacity="100%" style:font-name="Franklin Gothic Medium" fo:font-size="20pt" fo:font-style="normal"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fo:color="#ffffff" loext:opacity="100%" style:text-outline="false" style:text-line-through-style="none" style:text-line-through-type="none" style:text-position="0% 100%" style:font-name="Franklin Gothic Medium" fo:font-size="20pt" fo:letter-spacing="normal" fo:language="en" fo:country="CA"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Franklin Gothic Medium" fo:font-size="20pt" fo:letter-spacing="normal" fo:language="en" fo:country="CA" fo:font-style="normal" style:text-underline-style="solid" style:text-underline-width="auto" style:text-underline-color="font-color" fo:font-weight="bold" fo:background-color="transparent" style:font-name-asian="Arial" style:font-size-asian="20pt" style:font-style-asian="normal" style:font-weight-asian="bold" style:font-name-complex="Arial" style:font-size-complex="20pt" style:font-style-complex="normal" style:font-weight-complex="bold"/>
    </style:style>
    <style:style style:name="T7" style:family="text">
      <style:text-properties fo:font-variant="normal" fo:text-transform="none" fo:color="#ffffff" loext:opacity="100%" style:text-outline="false" style:text-line-through-style="none" style:text-line-through-type="none" style:text-position="0% 100%" style:font-name="Franklin Gothic Medium" fo:font-size="18pt" fo:letter-spacing="normal" fo:language="en" fo:country="CA" fo:font-style="normal" fo:background-color="transparent" style:font-name-asian="Arial" style:font-size-asian="18pt" style:font-style-asian="normal" style:font-name-complex="Arial" style:font-size-complex="18pt" style:font-style-complex="normal"/>
    </style:style>
    <style:style style:name="T8" style:family="text">
      <style:text-properties fo:font-variant="normal" fo:text-transform="none" fo:color="#ffffff" loext:opacity="100%" style:text-outline="false" style:text-line-through-style="none" style:text-line-through-type="none" style:text-position="0% 100%" style:font-name="Franklin Gothic Medium" fo:font-size="8pt" fo:letter-spacing="normal" fo:language="en" fo:country="CA" fo:font-style="normal" fo:background-color="transparent" style:font-name-asian="Arial" style:font-size-asian="8pt" style:font-style-asian="normal" style:font-name-complex="Arial" style:font-size-complex="8pt" style:font-style-complex="normal"/>
    </style:style>
    <style:style style:name="T9" style:family="text">
      <style:text-properties fo:color="#a9c0e8" loext:opacity="100%" style:font-name="Franklin Gothic Medium" fo:font-size="22pt" style:font-size-asian="22pt" style:font-size-complex="22pt"/>
    </style:style>
    <style:style style:name="T10" style:family="text">
      <style:text-properties fo:font-variant="normal" fo:text-transform="none" fo:color="#a9c0e8" loext:opacity="100%" style:text-outline="false" style:text-line-through-style="none" style:text-line-through-type="none" style:text-position="0% 100%" style:font-name="Franklin Gothic Medium" fo:font-size="18pt" fo:letter-spacing="normal" fo:language="en" fo:country="CA" fo:font-style="normal" style:text-underline-style="solid" style:text-underline-width="auto" style:text-underline-color="font-color" fo:background-color="transparent" style:font-name-asian="Arial" style:font-size-asian="18pt" style:font-style-asian="normal" style:font-name-complex="Arial" style:font-size-complex="18pt" style:font-style-complex="normal"/>
    </style:style>
    <style:style style:name="T11" style:family="text">
      <style:text-properties fo:color="#ffffff" loext:opacity="100%" style:font-name="Franklin Gothic Medium" fo:font-size="42pt" style:font-size-asian="42pt" style:font-size-complex="42pt"/>
    </style:style>
    <style:style style:name="T12" style:family="text">
      <style:text-properties fo:font-variant="normal" fo:text-transform="none" fo:color="#ffffff" loext:opacity="100%" style:text-outline="false" style:text-line-through-style="none" style:text-line-through-type="none" style:text-position="0% 100%" style:font-name="Franklin Gothic Medium" fo:font-size="18pt" fo:letter-spacing="normal" fo:language="en" fo:country="CA"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text-position="0% 100%" style:font-name="Franklin Gothic Medium" fo:font-size="16pt" fo:letter-spacing="normal" fo:language="en" fo:country="CA" fo:font-style="normal" fo:background-color="transparent" style:font-name-asian="Arial" style:font-size-asian="16pt" style:font-style-asian="normal" style:font-name-complex="Arial" style:font-size-complex="16pt" style:font-style-complex="normal"/>
    </style:style>
    <style:style style:name="T14" style:family="text">
      <style:text-properties fo:font-variant="normal" fo:text-transform="none" fo:color="#ffffff" loext:opacity="100%" style:text-outline="false" style:text-line-through-style="none" style:text-line-through-type="none" style:text-position="0% 100%" style:font-name="Franklin Gothic Medium" fo:font-size="18pt" fo:letter-spacing="normal" fo:language="en" fo:country="CA" fo:font-style="italic" fo:font-weight="bold" fo:background-color="transparent" style:font-name-asian="Arial" style:font-size-asian="18pt" style:font-style-asian="italic" style:font-weight-asian="bold" style:font-name-complex="Arial" style:font-size-complex="18pt" style:font-style-complex="italic" style:font-weight-complex="bold"/>
    </style:style>
    <style:style style:name="T15" style:family="text">
      <style:text-properties fo:font-variant="normal" fo:text-transform="none" fo:color="#a9c0e8" loext:opacity="100%" style:text-outline="false" style:text-line-through-style="none" style:text-line-through-type="none" style:text-position="0% 100%" style:font-name="Franklin Gothic Medium" fo:font-size="16pt" fo:letter-spacing="normal" fo:language="en" fo:country="CA" fo:font-style="normal" style:text-underline-style="solid" style:text-underline-width="auto" style:text-underline-color="font-color" fo:background-color="transparent" style:font-name-asian="Arial" style:font-size-asian="16pt" style:font-style-asian="normal" style:font-name-complex="Arial" style:font-size-complex="16pt" style:font-style-complex="normal"/>
    </style:style>
    <style:style style:name="T16" style:family="text">
      <style:text-properties fo:font-variant="normal" fo:text-transform="none" fo:color="#ffffff" loext:opacity="100%" style:text-outline="false" style:text-line-through-style="none" style:text-line-through-type="none" style:text-position="0% 100%" style:font-name="Franklin Gothic Medium" fo:font-size="20pt" fo:letter-spacing="normal" fo:language="en" fo:country="CA" fo:font-style="normal" fo:background-color="transparent" style:font-name-asian="Arial" style:font-size-asian="20pt" style:font-style-asian="normal" style:font-name-complex="Arial" style:font-size-complex="20pt" style:font-style-complex="normal"/>
    </style:style>
    <style:style style:name="T17" style:family="text">
      <style:text-properties fo:font-variant="normal" fo:text-transform="none" fo:color="#ffffff" loext:opacity="100%" style:text-outline="false" style:text-line-through-style="none" style:text-line-through-type="none" style:text-position="0% 100%" style:font-name="Franklin Gothic Medium" fo:font-size="20pt" fo:letter-spacing="normal" fo:language="en" fo:country="CA" fo:font-style="italic" fo:font-weight="bold" fo:background-color="transparent" style:font-name-asian="Arial" style:font-size-asian="20pt" style:font-style-asian="italic" style:font-weight-asian="bold" style:font-name-complex="Arial" style:font-size-complex="20pt" style:font-style-complex="italic"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Franklin Gothic Medium" fo:font-size="14pt" fo:letter-spacing="normal" fo:language="en" fo:country="CA"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Franklin Gothic Medium" fo:font-size="15pt" fo:letter-spacing="normal" fo:language="en" fo:country="CA" fo:font-style="normal" fo:background-color="transparent" style:font-name-asian="Arial" style:font-size-asian="15pt" style:font-style-asian="normal" style:font-name-complex="Arial" style:font-size-complex="15pt" style:font-style-complex="normal"/>
    </style:style>
    <style:style style:name="T20" style:family="text">
      <style:text-properties fo:color="#a9c0e8" loext:opacity="100%" style:font-name="Franklin Gothic Medium" fo:font-size="32pt" style:font-size-asian="32pt" style:font-size-complex="32pt"/>
    </style:style>
    <style:style style:name="T21" style:family="text">
      <style:text-properties fo:font-variant="normal" fo:text-transform="none" fo:color="#ffffff" loext:opacity="100%" style:text-outline="false" style:text-line-through-style="none" style:text-line-through-type="none" style:text-position="0% 100%" style:font-name="Franklin Gothic Medium" fo:font-size="15pt" fo:letter-spacing="normal" fo:language="en" fo:country="CA" fo:font-style="italic" fo:font-weight="bold" fo:background-color="transparent" style:font-name-asian="Arial" style:font-size-asian="15pt" style:font-style-asian="italic" style:font-weight-asian="bold" style:font-name-complex="Arial" style:font-size-complex="15pt" style:font-style-complex="italic" style:font-weight-complex="bold"/>
    </style:style>
    <style:style style:name="T22" style:family="text">
      <style:text-properties fo:font-variant="normal" fo:text-transform="none" fo:color="#ffffff" loext:opacity="100%" style:text-outline="false" style:text-line-through-style="none" style:text-line-through-type="none" style:text-position="0% 100%" style:font-name="Franklin Gothic Medium" fo:font-size="15pt" fo:letter-spacing="normal" fo:language="en" fo:country="CA" fo:background-color="transparent" style:font-name-asian="Arial" style:font-size-asian="15pt" style:font-name-complex="Arial" style:font-size-complex="15pt"/>
    </style:style>
    <style:style style:name="T23" style:family="text">
      <style:text-properties fo:font-variant="normal" fo:text-transform="none" fo:color="#e6ebf2" loext:opacity="100%" style:text-outline="false" style:text-line-through-style="none" style:text-line-through-type="none" style:text-position="0% 100%" style:font-name="Franklin Gothic Medium" fo:font-size="13pt" fo:letter-spacing="normal" fo:language="en" fo:country="CA" fo:font-style="normal" fo:background-color="transparent" style:font-name-asian="Arial" style:font-size-asian="12pt" style:font-style-asian="normal" style:font-name-complex="Arial" style:font-size-complex="12pt" style:font-style-complex="normal"/>
    </style:style>
    <style:style style:name="T24" style:family="text">
      <style:text-properties fo:font-variant="normal" fo:text-transform="none" fo:color="#e6ebf2" loext:opacity="100%" style:text-outline="false" style:text-line-through-style="none" style:text-line-through-type="none" style:text-position="0% 100%" style:font-name="Franklin Gothic Medium" fo:font-size="13pt" fo:letter-spacing="normal" fo:language="en" fo:country="CA" fo:font-style="italic"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T25" style:family="text">
      <style:text-properties fo:font-variant="normal" fo:text-transform="none" fo:color="#ffffff"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6pt" style:font-style-asian="italic" style:font-weight-asian="bold" style:font-name-complex="Arial" style:font-size-complex="16pt" style:font-style-complex="italic" style:font-weight-complex="bold"/>
    </style:style>
    <style:style style:name="T26" style:family="text">
      <style:text-properties fo:font-variant="normal" fo:text-transform="none" fo:color="#ffffff" loext:opacity="100%" style:text-outline="false" style:text-line-through-style="none" style:text-line-through-type="none" style:text-position="0% 100%" style:font-name="Franklin Gothic Medium" fo:font-size="20pt" fo:letter-spacing="normal" fo:language="en" fo:country="CA" fo:background-color="transparent" style:font-name-asian="Arial" style:font-size-asian="20pt" style:font-name-complex="Arial" style:font-size-complex="20pt"/>
    </style:style>
    <style:style style:name="T27" style:family="text">
      <style:text-properties fo:font-variant="normal" fo:text-transform="none" fo:color="#ffffff" loext:opacity="100%" style:text-outline="false" style:text-line-through-style="none" style:text-line-through-type="none" style:text-position="0% 100%" style:font-name="Franklin Gothic Medium" fo:font-size="18pt" fo:letter-spacing="normal" fo:language="en" fo:country="CA" fo:background-color="transparent" style:font-name-asian="Arial" style:font-size-asian="18pt" style:font-name-complex="Arial" style:font-size-complex="18pt"/>
    </style:style>
    <style:style style:name="T28" style:family="text">
      <style:text-properties fo:font-variant="normal" fo:text-transform="none" fo:color="#ffffff"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6pt" style:font-name-complex="Arial" style:font-size-complex="16pt"/>
    </style:style>
    <style:style style:name="T29" style:family="text">
      <style:text-properties fo:font-variant="normal" fo:text-transform="none" fo:color="#a9c0e8"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6pt" style:font-name-complex="Arial" style:font-size-complex="16pt"/>
    </style:style>
    <style:style style:name="T30" style:family="text">
      <style:text-properties fo:font-variant="normal" fo:text-transform="none" fo:color="#ffffff" loext:opacity="100%" style:text-outline="false" style:text-line-through-style="none" style:text-line-through-type="none" style:text-position="0% 100%" style:font-name="Franklin Gothic Medium" fo:font-size="14pt" fo:letter-spacing="normal" fo:language="en" fo:country="CA" fo:background-color="transparent" style:font-name-asian="Arial" style:font-size-asian="14pt" style:font-name-complex="Arial" style:font-size-complex="14pt"/>
    </style:style>
    <style:style style:name="T31" style:family="text">
      <style:text-properties fo:font-variant="normal" fo:text-transform="none" fo:color="#a9c0e8" loext:opacity="100%" style:text-outline="false" style:text-line-through-style="none" style:text-line-through-type="none" style:text-position="0% 100%" style:font-name="Franklin Gothic Medium" fo:font-size="14pt" fo:letter-spacing="normal" fo:language="en" fo:country="CA" fo:background-color="transparent" style:font-name-asian="Arial" style:font-size-asian="14pt" style:font-name-complex="Arial" style:font-size-complex="14pt"/>
    </style:style>
    <style:style style:name="T32" style:family="text">
      <style:text-properties fo:font-variant="normal" fo:text-transform="none" fo:color="#ffffff" loext:opacity="100%" style:text-outline="false" style:text-line-through-style="none" style:text-line-through-type="none" style:text-position="0% 100%" style:font-name="Franklin Gothic Medium" fo:font-size="14pt" fo:letter-spacing="normal" fo:language="en" fo:country="CA" fo:font-style="italic" fo:font-weight="bold" fo:background-color="transparent" style:font-name-asian="Arial" style:font-size-asian="14pt" style:font-style-asian="italic" style:font-weight-asian="bold" style:font-name-complex="Arial" style:font-size-complex="14pt" style:font-style-complex="italic" style:font-weight-complex="bold"/>
    </style:style>
    <style:style style:name="T33" style:family="text">
      <style:text-properties fo:font-variant="normal" fo:text-transform="none" fo:color="#ffffff" loext:opacity="100%" style:text-outline="false" style:text-line-through-style="none" style:text-line-through-type="none" style:text-position="0% 100%" style:font-name="Franklin Gothic Medium" fo:font-size="12pt" fo:letter-spacing="normal" fo:language="en" fo:country="CA"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Franklin Gothic Medium" fo:font-size="12pt" fo:letter-spacing="normal" fo:language="en" fo:country="CA" fo:font-style="italic" style:text-underline-style="none"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T35" style:family="text">
      <style:text-properties fo:font-variant="normal" fo:text-transform="none" fo:color="#ffffff"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7pt" style:font-name-complex="Arial" style:font-size-complex="17pt"/>
    </style:style>
    <style:style style:name="T36" style:family="text">
      <style:text-properties fo:font-variant="normal" fo:text-transform="none" fo:color="#ffffff"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7pt" style:font-style-asian="italic" style:font-weight-asian="bold" style:font-name-complex="Arial" style:font-size-complex="17pt" style:font-style-complex="italic" style:font-weight-complex="bold"/>
    </style:style>
    <style:style style:name="T37" style:family="text">
      <style:text-properties fo:font-variant="normal" fo:text-transform="none" fo:color="#ffffff" loext:opacity="100%" style:text-outline="false" style:text-line-through-style="none" style:text-line-through-type="none" style:text-position="0% 100%" style:font-name="Franklin Gothic Medium" fo:font-size="14.8999996185303pt" fo:letter-spacing="normal" fo:language="en" fo:country="CA" fo:font-style="italic" fo:font-weight="bold" fo:background-color="transparent" style:font-name-asian="Arial" style:font-size-asian="14.8999996185303pt" style:font-style-asian="italic" style:font-weight-asian="bold" style:font-name-complex="Arial" style:font-size-complex="14.8999996185303pt" style:font-style-complex="italic" style:font-weight-complex="bold"/>
    </style:style>
    <style:style style:name="T38" style:family="text">
      <style:text-properties fo:font-variant="normal" fo:text-transform="none" fo:color="#ffffff" loext:opacity="100%" style:text-outline="false" style:text-line-through-style="none" style:text-line-through-type="none" style:text-position="0% 100%" style:font-name="Franklin Gothic Medium" fo:font-size="14.8999996185303pt" fo:letter-spacing="normal" fo:language="en" fo:country="CA" fo:background-color="transparent" style:font-name-asian="Arial" style:font-size-asian="14.8999996185303pt" style:font-name-complex="Arial" style:font-size-complex="14.8999996185303pt"/>
    </style:style>
    <style:style style:name="T39" style:family="text">
      <style:text-properties fo:font-variant="normal" fo:text-transform="none" fo:color="#ffffff" loext:opacity="100%" style:text-outline="false" style:text-line-through-style="none" style:text-line-through-type="none" style:text-position="0% 100%" style:font-name="Franklin Gothic Medium" fo:font-size="14pt" fo:letter-spacing="normal" fo:language="en" fo:country="CA" fo:font-style="italic" fo:background-color="transparent" style:font-name-asian="Arial" style:font-size-asian="14pt" style:font-style-asian="italic" style:font-name-complex="Arial" style:font-size-complex="14pt" style:font-style-complex="italic"/>
    </style:style>
    <style:style style:name="T40" style:family="text">
      <style:text-properties fo:font-variant="normal" fo:text-transform="none" fo:color="#ffffff" loext:opacity="100%" style:text-outline="false" style:text-line-through-style="none" style:text-line-through-type="none" style:text-position="0% 100%" style:font-name="Franklin Gothic Medium" fo:font-size="17pt" fo:letter-spacing="normal" fo:language="en" fo:country="CA" fo:background-color="transparent" style:font-name-asian="Arial" style:font-size-asian="17pt" style:font-name-complex="Arial" style:font-size-complex="17pt"/>
    </style:style>
    <style:style style:name="T41" style:family="text">
      <style:text-properties fo:font-variant="normal" fo:text-transform="none" fo:color="#ffffff" loext:opacity="100%" style:text-outline="false" style:text-line-through-style="none" style:text-line-through-type="none" style:text-position="0% 100%" style:font-name="Franklin Gothic Medium" fo:font-size="13pt" fo:letter-spacing="normal" fo:language="en" fo:country="CA" fo:font-style="normal" style:text-underline-style="none" fo:font-weight="normal" fo:background-color="transparent" style:font-name-asian="Arial" style:font-size-asian="13pt" style:font-style-asian="normal" style:font-weight-asian="normal" style:font-name-complex="Arial" style:font-size-complex="13pt" style:font-style-complex="normal" style:font-weight-complex="normal"/>
    </style:style>
    <style:style style:name="T42" style:family="text">
      <style:text-properties fo:font-variant="normal" fo:text-transform="none" fo:color="#ffffff" loext:opacity="100%" style:text-outline="false" style:text-line-through-style="none" style:text-line-through-type="none" style:text-position="0% 100%" style:font-name="Franklin Gothic Medium" fo:font-size="12.5pt" fo:letter-spacing="normal" fo:language="en" fo:country="CA" fo:background-color="transparent" style:font-name-asian="Arial" style:font-size-asian="12.5pt" style:font-name-complex="Arial" style:font-size-complex="12.5pt"/>
    </style:style>
    <style:style style:name="T43" style:family="text">
      <style:text-properties fo:font-variant="normal" fo:text-transform="none" fo:color="#ffffff" loext:opacity="100%" style:text-outline="false" style:text-line-through-style="none" style:text-line-through-type="none" style:text-position="0% 100%" style:font-name="Franklin Gothic Medium" fo:font-size="12.5pt" fo:letter-spacing="normal" fo:language="en" fo:country="CA" fo:font-style="italic" fo:font-weight="bold" fo:background-color="transparent" style:font-name-asian="Arial" style:font-size-asian="12.5pt" style:font-style-asian="italic" style:font-weight-asian="bold" style:font-name-complex="Arial" style:font-size-complex="12.5pt" style:font-style-complex="italic" style:font-weight-complex="bold"/>
    </style:style>
    <style:style style:name="T44" style:family="text">
      <style:text-properties fo:font-variant="normal" fo:text-transform="none" fo:color="#ffffff" loext:opacity="100%" style:text-outline="false" style:text-line-through-style="none" style:text-line-through-type="none" style:text-position="0% 100%" style:font-name="Franklin Gothic Medium" fo:font-size="17pt" fo:letter-spacing="normal" fo:language="en" fo:country="CA" fo:font-style="italic" fo:font-weight="bold" fo:background-color="transparent" style:font-name-asian="Arial" style:font-size-asian="17pt" style:font-style-asian="italic" style:font-weight-asian="bold" style:font-name-complex="Arial" style:font-size-complex="17pt" style:font-style-complex="italic" style:font-weight-complex="bold"/>
    </style:style>
    <style:style style:name="T45" style:family="text">
      <style:text-properties fo:font-variant="normal" fo:text-transform="none" fo:color="#ffffff" loext:opacity="100%" style:text-outline="false" style:text-line-through-style="none" style:text-line-through-type="none" style:text-position="0% 100%" style:font-name="Franklin Gothic Medium" fo:font-size="14.8000001907349pt" fo:letter-spacing="normal" fo:language="en" fo:country="CA" fo:font-style="italic" fo:font-weight="bold" fo:background-color="transparent" style:font-name-asian="Arial" style:font-size-asian="14.8000001907349pt" style:font-style-asian="italic" style:font-weight-asian="bold" style:font-name-complex="Arial" style:font-size-complex="14.8000001907349pt" style:font-style-complex="italic" style:font-weight-complex="bold"/>
    </style:style>
    <style:style style:name="T46" style:family="text">
      <style:text-properties fo:font-variant="normal" fo:text-transform="none" fo:color="#ffffff" loext:opacity="100%" style:text-outline="false" style:text-line-through-style="none" style:text-line-through-type="none" style:text-position="0% 100%" style:font-name="Franklin Gothic Medium" fo:font-size="14.8000001907349pt" fo:letter-spacing="normal" fo:language="en" fo:country="CA" fo:background-color="transparent" style:font-name-asian="Arial" style:font-size-asian="14.8000001907349pt" style:font-name-complex="Arial" style:font-size-complex="14.8000001907349pt"/>
    </style:style>
    <style:style style:name="T47" style:family="text">
      <style:text-properties fo:font-variant="normal" fo:text-transform="none" fo:color="#ffffff" loext:opacity="100%" style:text-outline="false" style:text-line-through-style="none" style:text-line-through-type="none" style:text-position="0% 100%" style:font-name="Franklin Gothic Medium" fo:font-size="16.5pt" fo:letter-spacing="normal" fo:language="en" fo:country="CA" fo:background-color="transparent" style:font-name-asian="Arial" style:font-size-asian="16.5pt" style:font-name-complex="Arial" style:font-size-complex="16.5pt"/>
    </style:style>
    <style:style style:name="T48" style:family="text">
      <style:text-properties fo:font-variant="normal" fo:text-transform="none" fo:color="#ffffff" loext:opacity="100%" style:text-outline="false" style:text-line-through-style="none" style:text-line-through-type="none" style:text-position="0% 100%" style:font-name="Franklin Gothic Medium" fo:font-size="16.5pt" fo:letter-spacing="normal" fo:language="en" fo:country="CA" fo:font-style="italic" fo:font-weight="bold" fo:background-color="transparent" style:font-name-asian="Arial" style:font-size-asian="16.5pt" style:font-style-asian="italic" style:font-weight-asian="bold" style:font-name-complex="Arial" style:font-size-complex="16.5pt" style:font-style-complex="italic" style:font-weight-complex="bold"/>
    </style:style>
    <style:style style:name="T49" style:family="text">
      <style:text-properties fo:font-variant="normal" fo:text-transform="none" fo:color="#a9c0e8" loext:opacity="100%" style:text-outline="false" style:text-line-through-style="none" style:text-line-through-type="none" style:text-position="0% 100%" style:font-name="Franklin Gothic Medium" fo:font-size="15pt" fo:letter-spacing="normal" fo:language="en" fo:country="CA" fo:font-style="normal" style:text-underline-style="solid" style:text-underline-width="auto" style:text-underline-color="font-color" fo:background-color="transparent" style:font-name-asian="Arial" style:font-size-asian="15pt" style:font-style-asian="normal" style:font-name-complex="Arial" style:font-size-complex="15pt" style:font-style-complex="normal"/>
    </style:style>
    <style:style style:name="T50" style:family="text">
      <style:text-properties fo:font-variant="normal" fo:text-transform="none" fo:color="#ffffff" loext:opacity="100%" style:text-outline="false" style:text-line-through-style="none" style:text-line-through-type="none" style:text-position="0% 100%" style:font-name="Franklin Gothic Medium" fo:font-size="15pt" fo:letter-spacing="normal" fo:language="en" fo:country="CA" fo:font-style="normal" fo:font-weight="normal" fo:background-color="transparent" style:font-name-asian="Arial" style:font-size-asian="15pt" style:font-style-asian="normal" style:font-weight-asian="normal" style:font-name-complex="Arial" style:font-size-complex="15pt" style:font-style-complex="normal" style:font-weight-complex="normal"/>
    </style:style>
    <style:style style:name="T51" style:family="text">
      <style:text-properties fo:font-variant="normal" fo:text-transform="none" fo:color="#ffffff" loext:opacity="100%" style:text-outline="false" style:text-line-through-style="none" style:text-line-through-type="none" style:text-position="0% 100%" style:font-name="Franklin Gothic Medium" fo:font-size="8pt" fo:letter-spacing="normal" fo:language="en" fo:country="CA" fo:font-style="normal" fo:font-weight="normal" fo:background-color="transparent" style:font-name-asian="Arial" style:font-size-asian="8pt" style:font-style-asian="normal" style:font-weight-asian="normal" style:font-name-complex="Arial" style:font-size-complex="8pt" style:font-style-complex="normal" style:font-weight-complex="normal"/>
    </style:style>
    <style:style style:name="T52" style:family="text">
      <style:text-properties fo:font-variant="normal" fo:text-transform="none" fo:color="#ffffff"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5pt" style:font-name-complex="Arial" style:font-size-complex="15pt"/>
    </style:style>
    <style:style style:name="T53" style:family="text">
      <style:text-properties fo:font-variant="normal" fo:text-transform="none" fo:color="#ffffff"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5pt" style:font-style-asian="italic" style:font-weight-asian="bold" style:font-name-complex="Arial" style:font-size-complex="15pt" style:font-style-complex="italic" style:font-weight-complex="bold"/>
    </style:style>
    <style:style style:name="T54" style:family="text">
      <style:text-properties fo:color="#ffffff" loext:opacity="100%" style:font-name="Franklin Gothic Medium" fo:font-size="40pt" style:font-size-asian="40pt" style:font-size-complex="40pt"/>
    </style:style>
    <style:style style:name="T55" style:family="text">
      <style:text-properties fo:font-variant="normal" fo:text-transform="none" fo:color="#ffffff" loext:opacity="100%" style:text-outline="false" style:text-line-through-style="none" style:text-line-through-type="none" style:text-position="0% 100%" style:font-name="Franklin Gothic Medium" fo:font-size="18pt" fo:letter-spacing="normal" fo:language="en" fo:country="CA" fo:font-style="italic" style:text-underline-style="none" fo:font-weight="bold" fo:background-color="transparent" style:font-name-asian="Arial" style:font-size-asian="18pt" style:font-style-asian="italic" style:font-weight-asian="bold" style:font-name-complex="Arial" style:font-size-complex="18pt" style:font-style-complex="italic" style:font-weight-complex="bold"/>
    </style:style>
    <style:style style:name="T56" style:family="text">
      <style:text-properties fo:font-variant="normal" fo:text-transform="none" fo:color="#a9c0e8" loext:opacity="100%" style:text-outline="false" style:text-line-through-style="none" style:text-line-through-type="none" style:text-position="0% 100%" style:font-name="Franklin Gothic Medium" fo:font-size="16pt" fo:letter-spacing="normal" fo:language="en" fo:country="CA" fo:font-style="italic" style:text-underline-style="solid" style:text-underline-width="auto" style:text-underline-color="font-color" fo:font-weight="normal" fo:background-color="transparent" style:font-name-asian="Arial" style:font-size-asian="15pt" style:font-style-asian="italic" style:font-weight-asian="normal" style:font-name-complex="Arial" style:font-size-complex="15pt" style:font-style-complex="italic" style:font-weight-complex="normal"/>
    </style:style>
    <style:style style:name="T57" style:family="text">
      <style:text-properties fo:font-variant="normal" fo:text-transform="none" fo:color="#ffffff" loext:opacity="100%" style:text-outline="false" style:text-line-through-style="none" style:text-line-through-type="none" style:text-position="0% 100%" style:font-name="Franklin Gothic Medium" fo:font-size="8pt" fo:letter-spacing="normal" fo:language="en" fo:country="CA" fo:font-style="italic" style:text-underline-style="solid" style:text-underline-width="auto" style:text-underline-color="font-color" fo:font-weight="bold" fo:background-color="transparent" style:font-name-asian="Arial" style:font-size-asian="8pt" style:font-style-asian="italic" style:font-weight-asian="bold" style:font-name-complex="Arial" style:font-size-complex="8pt" style:font-style-complex="italic" style:font-weight-complex="bold"/>
    </style:style>
    <style:style style:name="T58" style:family="text">
      <style:text-properties fo:font-variant="normal" fo:text-transform="none" fo:color="#ffffff" loext:opacity="100%" style:text-outline="false" style:text-line-through-style="none" style:text-line-through-type="none" style:text-position="0% 100%" style:font-name="Franklin Gothic Medium" fo:font-size="14pt" fo:letter-spacing="normal" fo:language="en" fo:country="CA"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59" style:family="text">
      <style:text-properties fo:font-variant="normal" fo:text-transform="none" fo:color="#ffffff" loext:opacity="100%" style:text-outline="false" style:text-line-through-style="none" style:text-line-through-type="none" style:text-position="0% 100%" style:font-name="Franklin Gothic Medium" fo:font-size="14pt" fo:letter-spacing="normal" fo:language="en" fo:country="CA" fo:font-style="italic" style:text-underline-style="solid" style:text-underline-width="auto" style:text-underline-color="font-color" fo:font-weight="bold" fo:background-color="transparent" style:font-name-asian="Arial" style:font-size-asian="14pt" style:font-style-asian="italic" style:font-weight-asian="bold" style:font-name-complex="Arial" style:font-size-complex="14pt" style:font-style-complex="italic" style:font-weight-complex="bold"/>
    </style:style>
    <style:style style:name="T60" style:family="text">
      <style:text-properties fo:font-variant="normal" fo:text-transform="none" fo:color="#a9c0e8" loext:opacity="100%" style:text-outline="false" style:text-line-through-style="none" style:text-line-through-type="none" style:text-position="0% 100%" style:font-name="Franklin Gothic Medium" fo:font-size="16pt" fo:letter-spacing="normal" fo:language="en" fo:country="CA" fo:font-style="italic" style:text-underline-style="solid" style:text-underline-width="auto" style:text-underline-color="font-color" fo:background-color="transparent" style:font-name-asian="Arial" style:font-size-asian="15pt" style:font-style-asian="italic" style:font-name-complex="Arial" style:font-size-complex="15pt" style:font-style-complex="italic"/>
    </style:style>
    <style:style style:name="T61" style:family="text">
      <style:text-properties fo:font-variant="normal" fo:text-transform="none" fo:color="#ffffff" loext:opacity="100%" style:text-outline="false" style:text-line-through-style="none" style:text-line-through-type="none" style:text-position="0% 100%" style:font-name="Franklin Gothic Medium" fo:font-size="8pt" fo:letter-spacing="normal" fo:language="en" fo:country="CA" fo:background-color="transparent" style:font-name-asian="Arial" style:font-size-asian="8pt" style:font-name-complex="Arial" style:font-size-complex="8pt"/>
    </style:style>
    <style:style style:name="T62" style:family="text">
      <style:text-properties fo:color="#ffffff" loext:opacity="100%" style:font-name="Franklin Gothic Medium" fo:font-size="22pt" style:font-size-asian="22pt" style:font-size-complex="22pt"/>
    </style:style>
    <style:style style:name="T63" style:family="text">
      <style:text-properties fo:color="#ffffff" loext:opacity="100%" style:font-name="Franklin Gothic Medium" fo:font-size="22pt" fo:font-style="italic" fo:font-weight="bold" style:font-size-asian="22pt" style:font-style-asian="italic" style:font-weight-asian="bold" style:font-size-complex="22pt" style:font-style-complex="italic" style:font-weight-complex="bold"/>
    </style:style>
    <style:style style:name="T64" style:family="text">
      <style:text-properties fo:color="#ffffff" loext:opacity="100%" style:font-name="Franklin Gothic Medium" fo:font-size="22pt" fo:font-style="normal" fo:font-weight="normal" style:font-size-asian="22pt" style:font-style-asian="normal" style:font-weight-asian="normal" style:font-size-complex="22pt" style:font-style-complex="normal" style:font-weight-complex="normal"/>
    </style:style>
    <style:style style:name="T65" style:family="text">
      <style:text-properties fo:color="#a9c0e8" loext:opacity="100%" style:font-name="Franklin Gothic Medium"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66" style:family="text">
      <style:text-properties fo:color="#ffffff" loext:opacity="100%" style:font-name="Franklin Gothic Medium" fo:font-size="22pt" fo:font-style="normal" style:text-underline-style="none" fo:font-weight="normal" style:font-size-asian="22pt" style:font-style-asian="normal" style:font-weight-asian="normal" style:font-size-complex="22pt" style:font-style-complex="normal" style:font-weight-complex="normal"/>
    </style:style>
    <style:style style:name="T67" style:family="text">
      <style:text-properties fo:font-variant="normal" fo:text-transform="none" fo:color="#ffffff" loext:opacity="100%" style:text-outline="false" style:text-line-through-style="none" style:text-line-through-type="none" style:text-position="0% 100%" style:font-name="Franklin Gothic Medium" fo:font-size="22pt" fo:letter-spacing="normal" fo:language="en" fo:country="CA"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68" style:family="text">
      <style:text-properties fo:font-variant="normal" fo:text-transform="none" fo:color="#a9c0e8" loext:opacity="100%" style:text-outline="false" style:text-line-through-style="none" style:text-line-through-type="none" style:text-position="0% 100%" style:font-name="Franklin Gothic Medium" fo:font-size="22pt" fo:letter-spacing="normal" fo:language="en" fo:country="CA" fo:font-style="normal" style:text-underline-style="solid" style:text-underline-width="auto" style:text-underline-color="font-color"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69" style:family="text">
      <style:text-properties fo:font-variant="normal" fo:text-transform="none" fo:color="#ffffff" loext:opacity="100%" style:text-outline="false" style:text-line-through-style="none" style:text-line-through-type="none" style:text-position="0% 100%" style:font-name="Franklin Gothic Medium" fo:font-size="22pt" fo:letter-spacing="normal" fo:language="en" fo:country="CA" fo:font-style="normal" style:text-underline-style="none" fo:font-weight="bold" fo:background-color="transparent" style:font-name-asian="Arial" style:font-size-asian="22pt" style:font-style-asian="normal" style:font-weight-asian="bold" style:font-name-complex="Arial" style:font-size-complex="22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xml:id="id1" draw:id="id1">
        <office:forms form:automatic-focus="false" form:apply-design-mode="false"/>
        <draw:custom-shape draw:style-name="gr1" draw:text-style-name="P1" draw:layer="layout" svg:width="26.5cm" svg:height="12cm" svg:x="0.8cm" svg:y="2cm">
          <text:p/>
          <draw:enhanced-geometry svg:viewBox="0 0 21600 21600" draw:mirror-horizontal="false" draw:mirror-vertical="false" draw:type="rectangle" draw:enhanced-path="M 0 0 L 21600 0 21600 21600 0 21600 0 0 Z N"/>
        </draw:custom-shape>
        <draw:frame draw:style-name="gr2" draw:text-style-name="P2" draw:layer="layout" svg:width="11.07cm" svg:height="3.5cm" svg:x="16.23cm" svg:y="10.5cm">
          <draw:image xlink:href="Pictures/100000010000077E0000025F42403837.png" xlink:type="simple" xlink:show="embed" xlink:actuate="onLoad" draw:mime-type="image/png">
            <text:p/>
          </draw:image>
        </draw:frame>
        <draw:frame presentation:style-name="pr1" draw:text-style-name="P3" draw:layer="layout" svg:width="25.199cm" svg:height="2.629cm" svg:x="1.301cm" svg:y="2.471cm" presentation:class="title" presentation:user-transformed="true">
          <draw:text-box>
            <text:p><text:span text:style-name="T1">Ontario I.D. Guide Workshop</text:span></text:p>
          </draw:text-box>
        </draw:frame>
        <draw:frame presentation:style-name="pr2" draw:text-style-name="P5" draw:layer="layout" svg:width="26.5cm" svg:height="3cm" svg:x="1cm" svg:y="4.5cm" presentation:class="subtitle" presentation:user-transformed="true">
          <draw:text-box>
            <text:p text:style-name="P4"><text:span text:style-name="T2">Presented by </text:span><text:span text:style-name="T3">Dana Rosamund Teagle</text:span><text:span text:style-name="T4"> (she/her)</text:span></text:p>
            <text:p text:style-name="P4"><text:span text:style-name="T5">Slides and documents are available for download at </text:span><text:span text:style-name="T6"><text:a xlink:href="https://idguide.ca/" xlink:type="simple">https://idguide.ca</text:a></text:span><text:span text:style-name="T6">/downloads</text:span></text:p>
          </draw:text-box>
        </draw:frame>
        <draw:frame draw:name="Google Shape;93;p1" draw:style-name="gr3" draw:text-style-name="P6" draw:layer="layout" svg:width="5cm" svg:height="5cm" svg:x="1.7cm" svg:y="7.8cm">
          <draw:image xlink:href="Pictures/1000000000000264000002645CAEB01D.jpg" xlink:type="simple" xlink:show="embed" xlink:actuate="onLoad" draw:mime-type="image/jpeg">
            <text:p/>
          </draw:image>
          <svg:desc>Royalty Free Transgender Flag Clip Art, Vector Images &amp; Illustrations ...</svg:desc>
        </draw:frame>
        <draw:frame presentation:style-name="pr3" draw:text-style-name="P8" draw:layer="layout" svg:width="9cm" svg:height="4.643cm" svg:x="7.5cm" svg:y="7.9cm">
          <draw:text-box>
            <text:p text:style-name="P7"><text:span text:style-name="T7">- Legal name changes</text:span></text:p>
            <text:p text:style-name="P7"><text:span text:style-name="T7">- Birth certificates</text:span></text:p>
            <text:p text:style-name="P7"><text:span text:style-name="T7">- Health cards</text:span></text:p>
            <text:p text:style-name="P7"><text:span text:style-name="T7">- Driver’s licenses &amp; photo cards</text:span></text:p>
            <text:p text:style-name="P7"><text:span text:style-name="T7">- Travel documents</text:span></text:p>
            <text:p text:style-name="P7"><text:span text:style-name="T8"/></text:p>
            <text:p text:style-name="P7"><text:span text:style-name="T7">&amp; more</text:span></text:p>
          </draw:text-box>
        </draw:frame>
        <draw:frame draw:style-name="gr4" draw:text-style-name="P10" draw:layer="layout" svg:width="5.426cm" svg:height="1.133cm" svg:x="21.2cm" svg:y="9.967cm">
          <draw:text-box>
            <text:p text:style-name="P9"><text:span text:style-name="T9">February 2026</text:span></text:p>
          </draw:text-box>
        </draw:frame>
        <draw:line draw:style-name="gr5" draw:text-style-name="P2" draw:layer="layout" svg:x1="17.5cm" svg:y1="9.5cm" svg:x2="26.5cm" svg:y2="9.5cm">
          <text:p/>
        </draw:line>
        <draw:frame presentation:style-name="pr4" draw:text-style-name="P11" draw:layer="layout" svg:width="9cm" svg:height="0.8cm" svg:x="17.4cm" svg:y="8.2cm">
          <draw:text-box>
            <text:p text:style-name="P9"><text:span text:style-name="T10"><text:a xlink:href="https://idguide.ca/" xlink:type="simple">https://idguide.ca</text:a></text:span></text:p>
          </draw:text-box>
        </draw:frame>
        <draw:line draw:style-name="gr6" draw:text-style-name="P12" draw:layer="layout" svg:x1="17.5cm" svg:y1="7.7cm" svg:x2="26.5cm" svg:y2="7.7cm">
          <text:p/>
        </draw:line>
        <anim:par presentation:node-type="timing-root">
          <anim:par smil:begin="id1.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1" presentation:class="page"/>
          <draw:frame presentation:style-name="pr5"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xml:id="id2" draw:id="id2">
        <office:forms form:automatic-focus="false" form:apply-design-mode="false"/>
        <draw:custom-shape draw:style-name="gr1" draw:text-style-name="P1" draw:layer="layout" svg:width="26.5cm" svg:height="12cm" svg:x="0.8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5cm" svg:y="2.6cm" presentation:class="title" presentation:user-transformed="true">
          <draw:text-box>
            <text:p text:style-name="P7"><text:span text:style-name="T11">A quick background on me</text:span></text:p>
          </draw:text-box>
        </draw:frame>
        <draw:frame presentation:style-name="pr7" draw:text-style-name="P17" draw:layer="layout" svg:width="25.3cm" svg:height="8.439cm" svg:x="1.5cm" svg:y="4.761cm" presentation:class="subtitle" presentation:user-transformed="true">
          <draw:text-box>
            <text:p text:style-name="P15"><text:span text:style-name="T12">I’m Dana Rosamund Teagle, and I’m a designer and web/software developer based in Toronto, Ontario. I’ve led workshops on name and gender marker changes since 2021, and I now run I.D. Guide: a free, community-driven resource designed to help people navigate legal name, gender marker, and identity document changes in Canada.</text:span></text:p>
            <text:p text:style-name="P15"><text:span text:style-name="T7"/></text:p>
            <text:p text:style-name="P16"><text:span text:style-name="T7">Everyone deserves clear, accurate, and up-to-date information—but government agencies often make these processes confusing or hard to access. I.D. Guide brings together practical, step-by-step instructions and forms in one place to help you navigate these changes confidently.</text:span></text:p>
          </draw:text-box>
        </draw:frame>
        <anim:par presentation:node-type="timing-root">
          <anim:par smil:begin="id2.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2" presentation:class="page"/>
          <draw:frame presentation:style-name="pr5" draw:text-style-name="P1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xml:id="id3" draw:id="id3">
        <office:forms form:automatic-focus="false" form:apply-design-mode="false"/>
        <draw:custom-shape draw:style-name="gr8" draw:text-style-name="P18"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Our itinerary today</text:span></text:p>
          </draw:text-box>
        </draw:frame>
        <draw:frame presentation:style-name="pr8" draw:text-style-name="P19" draw:layer="layout" svg:width="24cm" svg:height="8.439cm" svg:x="2cm" svg:y="4.761cm" presentation:class="subtitle" presentation:user-transformed="true">
          <draw:text-box>
            <text:p text:style-name="P15"><text:span text:style-name="T13">Over the next 45 minutes or so, I will give an overview of:</text:span></text:p>
            <text:p text:style-name="P15"><text:span text:style-name="T13"/></text:p>
            <text:p text:style-name="P15"><text:span text:style-name="T14">- Ontario legal name changes</text:span></text:p>
            <text:p text:style-name="P15"><text:span text:style-name="T14">- Requests for Ontario birth registrations &amp; certificates</text:span></text:p>
            <text:p text:style-name="P15"><text:span text:style-name="T14">- Sex designation changes on Ontario driver’s licenses &amp; photo cards</text:span></text:p>
            <text:p text:style-name="P15"><text:span text:style-name="T14">- Ontario health card updates</text:span></text:p>
            <text:p text:style-name="P15"><text:span text:style-name="T14">- Passport updates</text:span></text:p>
            <text:p text:style-name="P15"><text:span text:style-name="T14">- Permanent residency card updates</text:span></text:p>
            <text:p text:style-name="P15"><text:span text:style-name="T14">- Updates to the S.I.N. registry and the C.R.A.</text:span></text:p>
            <text:p text:style-name="P15"><text:span text:style-name="T13"/></text:p>
            <text:p text:style-name="P15"><text:span text:style-name="T13">I will also point to resources I recommend for commissioning and notarizing, and other information and assistance for making these changes.</text:span></text:p>
          </draw:text-box>
        </draw:frame>
        <anim:par presentation:node-type="timing-root">
          <anim:par smil:begin="id3.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3" presentation:class="page"/>
          <draw:frame presentation:style-name="pr5" draw:text-style-name="P1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xml:id="id4" draw:id="id4">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Ontario legal name changes</text:span></text:p>
          </draw:text-box>
        </draw:frame>
        <draw:frame presentation:style-name="pr9" draw:text-style-name="P20" draw:layer="layout" svg:width="11.5cm" svg:height="1.279cm" svg:x="2cm" svg:y="4.661cm" presentation:class="subtitle" presentation:user-transformed="true">
          <draw:text-box>
            <text:p text:style-name="P15"><text:span text:style-name="T15"><text:a xlink:href="https://www.ontario.ca/page/change-name" xlink:type="simple">https://www.ontario.ca/page/change-name</text:a></text:span></text:p>
            <text:p text:style-name="P15"><text:span text:style-name="T15">https://idguide.ca/on/name</text:span></text:p>
          </draw:text-box>
        </draw:frame>
        <draw:frame presentation:style-name="pr10" draw:text-style-name="P21" draw:layer="layout" svg:width="13.5cm" svg:height="6.401cm" svg:x="2cm" svg:y="6.661cm">
          <draw:text-box>
            <text:p text:style-name="P15"><text:span text:style-name="T16">You will need to fill out the </text:span><text:span text:style-name="T17">Ontario Application to Change an Adult’s Name (11155E)</text:span><text:span text:style-name="T16">.</text:span></text:p>
            <text:p text:style-name="P15"><text:span text:style-name="T16"/></text:p>
            <text:p text:style-name="P15"><text:span text:style-name="T16">The application is nineteen pages long, and divided into seven parts, but you may not need to fill out all of them. You must also submit a fee of $137 with your application.</text:span></text:p>
          </draw:text-box>
        </draw:frame>
        <draw:frame draw:name="Google Shape;130;p6" draw:style-name="gr3" draw:text-style-name="P6" draw:layer="layout" svg:width="8.361cm" svg:height="5.339cm" svg:x="17.839cm" svg:y="5.061cm">
          <draw:image xlink:href="Pictures/10000001000002B1000001B8B0F5E43D.png" xlink:type="simple" xlink:show="embed" xlink:actuate="onLoad" draw:mime-type="image/png">
            <text:p/>
          </draw:image>
        </draw:frame>
        <draw:custom-shape draw:style-name="gr9" draw:text-style-name="P22"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10" draw:text-style-name="P23" draw:layer="layout" svg:width="9.5cm" svg:height="2.487cm" svg:x="17.1cm" svg:y="11.213cm">
          <draw:text-box>
            <text:p text:style-name="P9"><text:span text:style-name="T18">Note: This is based on 2024 edition of the application. Always make sure you are filling out the most recent version of any given document.</text:span></text:p>
          </draw:text-box>
        </draw:frame>
        <anim:par presentation:node-type="timing-root">
          <anim:par smil:begin="id4.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4" presentation:class="page"/>
          <draw:frame presentation:style-name="pr5" draw:text-style-name="P1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xml:id="id5" draw:id="id5">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Ontario legal name changes</text:span></text:p>
          </draw:text-box>
        </draw:frame>
        <draw:frame presentation:style-name="pr11" draw:text-style-name="P24" draw:layer="layout" svg:width="24cm" svg:height="9.586cm" svg:x="2cm" svg:y="6.337cm">
          <draw:text-box>
            <text:p text:style-name="P15"><text:span text:style-name="T19">This application requires you to fill out a lot of your personal information, including:</text:span></text:p>
            <text:p text:style-name="P15"><text:span text:style-name="T19"/></text:p>
            <text:p text:style-name="P15"><text:span text:style-name="T19">- Full current legal name</text:span></text:p>
            <text:p text:style-name="P15"><text:span text:style-name="T19">- New chosen name</text:span></text:p>
            <text:p text:style-name="P15"><text:span text:style-name="T19">- Mailing address</text:span></text:p>
            <text:p text:style-name="P15"><text:span text:style-name="T19">- Date and location of birth</text:span></text:p>
            <text:p text:style-name="P15"><text:span text:style-name="T19">- Marital/relationship status</text:span></text:p>
            <text:p text:style-name="P15"><text:span text:style-name="T19">- Parental information</text:span></text:p>
            <text:p text:style-name="P15"><text:span text:style-name="T19">- Details of any previous name change</text:span></text:p>
            <text:p text:style-name="P15"><text:span text:style-name="T19">- Information about any current or past criminal offences</text:span></text:p>
            <text:p text:style-name="P15"><text:span text:style-name="T19">- Information about any current or past financial judgments, fines, or bankruptcy</text:span></text:p>
            <text:p text:style-name="P15"><text:span text:style-name="T19"/></text:p>
          </draw:text-box>
        </draw:frame>
        <draw:frame presentation:style-name="pr12" draw:text-style-name="P25" draw:layer="layout" svg:width="11.6cm" svg:height="1.284cm" svg:x="1.9cm" svg:y="4.608cm" presentation:class="title" presentation:user-transformed="true">
          <draw:text-box>
            <text:p text:style-name="P7"><text:span text:style-name="T20">Requirements</text:span></text:p>
          </draw:text-box>
        </draw:frame>
        <draw:frame draw:name="Google Shape;140;p7" draw:style-name="gr11" draw:text-style-name="P6" draw:layer="layout" svg:width="5.5cm" svg:height="9.965cm" svg:x="22cm" svg:y="0.635cm">
          <draw:image xlink:href="Pictures/10000000000009C4000006827CD3279B.jpg" xlink:type="simple" xlink:show="embed" xlink:actuate="onLoad" draw:mime-type="image/jpeg">
            <text:p/>
          </draw:image>
          <svg:desc>Pen placed on top of a signature line</svg:desc>
        </draw:frame>
        <anim:par presentation:node-type="timing-root">
          <anim:par smil:begin="id5.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5" presentation:class="page"/>
          <draw:frame presentation:style-name="pr5" draw:text-style-name="P1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xml:id="id6" draw:id="id6">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Ontario legal name changes</text:span></text:p>
          </draw:text-box>
        </draw:frame>
        <draw:frame presentation:style-name="pr13" draw:text-style-name="P24" draw:layer="layout" svg:width="18cm" svg:height="9.586cm" svg:x="2cm" svg:y="6.337cm">
          <draw:text-box>
            <text:p text:style-name="P15"><text:span text:style-name="T19">- If you are married or in a joint conjugal relationship, you are required to notify your partner or spouse about your name change and must complete Part 2</text:span></text:p>
            <text:p text:style-name="P15"><text:span text:style-name="T8"/></text:p>
            <text:p text:style-name="P15"><text:span text:style-name="T19">- If you are 16 or 17 and changing your own name, you will require the consent of every individual who holds legal custody over you and must complete Part 3</text:span></text:p>
            <text:p text:style-name="P15"><text:span text:style-name="T8"/></text:p>
            <text:p text:style-name="P15"><text:span text:style-name="T19">- If you have any outstanding law enforcement orders against you, have ever been convicted of a criminal offence, or have any pending criminal charges against you, you will need a police record check as part of your application</text:span></text:p>
            <text:p text:style-name="P15"><text:span text:style-name="T8"/></text:p>
            <text:p text:style-name="P15"><text:span text:style-name="T19">- If you were born in another part of Canada and want a new birth certificate, you must contact the province or territory where you were born after you receive your change of name certificate</text:span></text:p>
          </draw:text-box>
        </draw:frame>
        <draw:frame presentation:style-name="pr12" draw:text-style-name="P25" draw:layer="layout" svg:width="11.6cm" svg:height="1.284cm" svg:x="1.9cm" svg:y="4.608cm" presentation:class="title" presentation:user-transformed="true">
          <draw:text-box>
            <text:p text:style-name="P7"><text:span text:style-name="T20">Additional sections</text:span></text:p>
          </draw:text-box>
        </draw:frame>
        <draw:frame draw:name="Google Shape;148;p8" draw:style-name="gr12" draw:text-style-name="P6" draw:layer="layout" svg:width="6.865cm" svg:height="9.365cm" svg:x="20.635cm" svg:y="0.635cm">
          <draw:image xlink:href="Pictures/10000000000009C4000007FDD57F4ACF.jpg" xlink:type="simple" xlink:show="embed" xlink:actuate="onLoad" draw:mime-type="image/jpeg">
            <text:p/>
          </draw:image>
          <svg:desc>Pastel checklist and pencil</svg:desc>
        </draw:frame>
        <anim:par presentation:node-type="timing-root">
          <anim:par smil:begin="id6.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6" presentation:class="page"/>
          <draw:frame presentation:style-name="pr5" draw:text-style-name="P1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xml:id="id7" draw:id="id7">
        <office:forms form:automatic-focus="false" form:apply-design-mode="false"/>
        <draw:custom-shape draw:style-name="gr13"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Ontario legal name changes</text:span></text:p>
          </draw:text-box>
        </draw:frame>
        <draw:frame presentation:style-name="pr14" draw:text-style-name="P24" draw:layer="layout" svg:width="18cm" svg:height="9.586cm" svg:x="2cm" svg:y="6.237cm">
          <draw:text-box>
            <text:p text:style-name="P15"><text:span text:style-name="T19">You will also require </text:span><text:span text:style-name="T21">a guarantor who can prove that you have lived in Ontario for 12 months prior</text:span><text:span text:style-name="T19"> to your application.</text:span></text:p>
            <text:p text:style-name="P15"><text:span text:style-name="T19"/></text:p>
            <text:p text:style-name="P15"><text:span text:style-name="T22">Most people use a medical professional, but other options include provincial judges, justices of the peace, chiefs of Indian bands, marriage officiants, medical practitioners, lawyers, municipal heads/clerks, school principals, and bank managers/signing officers. If you can't find someone who meets the requirements, you can use a non-relative who has known you for at least five years and can confirm your Ontario residency.</text:span></text:p>
            <text:p text:style-name="P15"><text:span text:style-name="T19"/></text:p>
            <text:p text:style-name="P15"><text:span text:style-name="T19">Make sure you remove the Guarantor’s statement section and have the chosen individual complete and return it to you before you submit the application.</text:span></text:p>
          </draw:text-box>
        </draw:frame>
        <draw:frame presentation:style-name="pr12" draw:text-style-name="P25" draw:layer="layout" svg:width="11.6cm" svg:height="1.284cm" svg:x="1.9cm" svg:y="4.608cm" presentation:class="title" presentation:user-transformed="true">
          <draw:text-box>
            <text:p text:style-name="P7"><text:span text:style-name="T20">Guarantor statement</text:span></text:p>
          </draw:text-box>
        </draw:frame>
        <draw:frame draw:name="Google Shape;159;p9" draw:style-name="gr14" draw:text-style-name="P6" draw:layer="layout" svg:width="6.58cm" svg:height="11.865cm" svg:x="20.92cm" svg:y="0.635cm">
          <draw:image xlink:href="Pictures/10000000000009C4000006852401EA8E.jpg" xlink:type="simple" xlink:show="embed" xlink:actuate="onLoad" draw:mime-type="image/jpeg">
            <text:p/>
          </draw:image>
          <svg:desc>Sealed paper scrolls</svg:desc>
        </draw:frame>
        <anim:par presentation:node-type="timing-root">
          <anim:par smil:begin="id7.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7" presentation:class="page"/>
          <draw:frame presentation:style-name="pr5" draw:text-style-name="P1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xml:id="id8" draw:id="id8">
        <office:forms form:automatic-focus="false" form:apply-design-mode="false"/>
        <draw:custom-shape draw:style-name="gr13"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15" draw:text-style-name="P14" draw:layer="layout" svg:width="10.6cm" svg:height="3.363cm" svg:x="1.9cm" svg:y="2.605cm" presentation:class="title" presentation:user-transformed="true">
          <draw:text-box>
            <text:p text:style-name="P7"><text:span text:style-name="T11">Ontario legal name changes</text:span></text:p>
          </draw:text-box>
        </draw:frame>
        <draw:custom-shape draw:style-name="gr15" draw:text-style-name="P22" draw:layer="layout" svg:width="13.5cm" svg:height="2.3cm" svg:x="12.5cm" svg:y="2.7cm">
          <text:p/>
          <draw:enhanced-geometry svg:viewBox="0 0 21600 21600" draw:mirror-horizontal="false" draw:mirror-vertical="false" draw:type="rectangle" draw:enhanced-path="M 0 0 L 21600 0 21600 21600 0 21600 0 0 Z N"/>
        </draw:custom-shape>
        <draw:frame presentation:style-name="pr16" draw:text-style-name="P26" draw:layer="layout" svg:width="12.7cm" svg:height="2.065cm" svg:x="13cm" svg:y="3cm">
          <draw:text-box>
            <text:p text:style-name="P15"><text:span text:style-name="T23">If you were </text:span><text:span text:style-name="T24">born in Ontario and have a valid birth certificate</text:span><text:span text:style-name="T23">, you must include the originals of all previously issued short- or long-form certificates with your application</text:span></text:p>
          </draw:text-box>
        </draw:frame>
        <draw:frame presentation:style-name="pr17" draw:text-style-name="P25" draw:layer="layout" svg:width="10.1cm" svg:height="5.133cm" svg:x="1.9cm" svg:y="6.2cm" presentation:class="title" presentation:user-transformed="true">
          <draw:text-box>
            <text:p text:style-name="P7"><text:span text:style-name="T20">Previous identity documents and additional requirements</text:span></text:p>
          </draw:text-box>
        </draw:frame>
        <draw:custom-shape draw:style-name="gr16" draw:text-style-name="P22" draw:layer="layout" svg:width="13.5cm" svg:height="2.265cm" svg:x="12.5cm" svg:y="5.5cm">
          <text:p/>
          <draw:enhanced-geometry svg:viewBox="0 0 21600 21600" draw:mirror-horizontal="false" draw:mirror-vertical="false" draw:type="rectangle" draw:enhanced-path="M 0 0 L 21600 0 21600 21600 0 21600 0 0 Z N"/>
        </draw:custom-shape>
        <draw:frame presentation:style-name="pr18" draw:text-style-name="P26" draw:layer="layout" svg:width="12.7cm" svg:height="2.065cm" svg:x="13cm" svg:y="5.8cm">
          <draw:text-box>
            <text:p text:style-name="P15"><text:span text:style-name="T23">If you were </text:span><text:span text:style-name="T24">born outside of Ontario but within Canada</text:span><text:span text:style-name="T23">, you can submit either an original birth certificate or certified copy issued by the province or territory of your birth</text:span></text:p>
          </draw:text-box>
        </draw:frame>
        <draw:custom-shape draw:style-name="gr17" draw:text-style-name="P22" draw:layer="layout" svg:width="13.5cm" svg:height="2.25cm" svg:x="12.5cm" svg:y="8.25cm">
          <text:p/>
          <draw:enhanced-geometry svg:viewBox="0 0 21600 21600" draw:mirror-horizontal="false" draw:mirror-vertical="false" draw:type="rectangle" draw:enhanced-path="M 0 0 L 21600 0 21600 21600 0 21600 0 0 Z N"/>
        </draw:custom-shape>
        <draw:frame presentation:style-name="pr19" draw:text-style-name="P26" draw:layer="layout" svg:width="12.7cm" svg:height="2.065cm" svg:x="13cm" svg:y="8.85cm">
          <draw:text-box>
            <text:p text:style-name="P15"><text:span text:style-name="T23">If you </text:span><text:span text:style-name="T24">do not have a birth certificate</text:span><text:span text:style-name="T23">, you will likely need to apply for a new certificate before you can submit this application</text:span></text:p>
          </draw:text-box>
        </draw:frame>
        <draw:custom-shape draw:style-name="gr16" draw:text-style-name="P22" draw:layer="layout" svg:width="13.5cm" svg:height="2.265cm" svg:x="12.5cm" svg:y="11cm">
          <text:p/>
          <draw:enhanced-geometry svg:viewBox="0 0 21600 21600" draw:mirror-horizontal="false" draw:mirror-vertical="false" draw:type="rectangle" draw:enhanced-path="M 0 0 L 21600 0 21600 21600 0 21600 0 0 Z N"/>
        </draw:custom-shape>
        <draw:frame presentation:style-name="pr20" draw:text-style-name="P26" draw:layer="layout" svg:width="12.7cm" svg:height="2.065cm" svg:x="13cm" svg:y="11.3cm">
          <draw:text-box>
            <text:p text:style-name="P15"><text:span text:style-name="T23">If </text:span><text:span text:style-name="T24">all or part of a document sent in support of your change of name application is not written in English or French</text:span><text:span text:style-name="T23">, you must send an English or French translation</text:span></text:p>
          </draw:text-box>
        </draw:frame>
        <anim:par presentation:node-type="timing-root">
          <anim:par smil:begin="id8.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8" presentation:class="page"/>
          <draw:frame presentation:style-name="pr5" draw:text-style-name="P1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xml:id="id9" draw:id="id9">
        <office:forms form:automatic-focus="false" form:apply-design-mode="false"/>
        <draw:custom-shape draw:style-name="gr13"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Ontario legal name changes</text:span></text:p>
          </draw:text-box>
        </draw:frame>
        <draw:frame presentation:style-name="pr21" draw:text-style-name="P19" draw:layer="layout" svg:width="13cm" svg:height="7.03cm" svg:x="2cm" svg:y="6.337cm">
          <draw:text-box>
            <text:p text:style-name="P15"><text:span text:style-name="T25">All name changes registered under Ontario’s Change of Name Act are generally published in The Ontario Gazette</text:span><text:span text:style-name="T13">, however you can request non-publication if you are transgender, First Nations, Inuit, or Métis by submitting a completed Request for Non-Publication form with your change of name application.</text:span></text:p>
            <text:p text:style-name="P15"><text:span text:style-name="T13"/></text:p>
            <text:p text:style-name="P15"><text:span text:style-name="T13">They currently publish information both in paper and online, so if publication of your previous name is not desirable, </text:span><text:span text:style-name="T25">I would strongly recommend adding this into your process.</text:span></text:p>
          </draw:text-box>
        </draw:frame>
        <draw:frame presentation:style-name="pr22" draw:text-style-name="P25" draw:layer="layout" svg:width="16.6cm" svg:height="1.533cm" svg:x="1.9cm" svg:y="4.467cm" presentation:class="title" presentation:user-transformed="true">
          <draw:text-box>
            <text:p text:style-name="P7"><text:span text:style-name="T20">Request for non-publication</text:span></text:p>
          </draw:text-box>
        </draw:frame>
        <draw:frame draw:name="Google Shape;191;p11" draw:style-name="gr3" draw:text-style-name="P6" draw:layer="layout" svg:width="10.653cm" svg:height="6.498cm" svg:x="15.4cm" svg:y="6.302cm">
          <draw:image xlink:href="Pictures/1000000100000322000001E040A81AED.png" xlink:type="simple" xlink:show="embed" xlink:actuate="onLoad" draw:mime-type="image/png">
            <text:p/>
          </draw:image>
        </draw:frame>
        <anim:par presentation:node-type="timing-root">
          <anim:par smil:begin="id9.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9" presentation:class="page"/>
          <draw:frame presentation:style-name="pr5" draw:text-style-name="P2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xml:id="id10" draw:id="id10">
        <office:forms form:automatic-focus="false" form:apply-design-mode="false"/>
        <draw:custom-shape draw:style-name="gr13"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5cm" presentation:class="title" presentation:user-transformed="true">
          <draw:text-box>
            <text:p text:style-name="P7"><text:span text:style-name="T11">Ontario legal name changes</text:span></text:p>
          </draw:text-box>
        </draw:frame>
        <draw:frame presentation:style-name="pr23" draw:text-style-name="P17" draw:layer="layout" svg:width="24cm" svg:height="7.121cm" svg:x="2cm" svg:y="6.437cm">
          <draw:text-box>
            <text:p text:style-name="P15"><text:span text:style-name="T26">You must sign the statutory declaration on page 16 in front of </text:span><text:span text:style-name="T17">a commissioner for taking affidavits</text:span><text:span text:style-name="T26">, who will seal or stamp the document at that time to verify your identity and the accuracy of the information as written. </text:span><text:span text:style-name="T17">The commissioner does not have to know the person signing the application.</text:span></text:p>
            <text:p text:style-name="P15"><text:span text:style-name="T27"/></text:p>
            <text:p text:style-name="P15"><text:span text:style-name="T26">Several notary/commissioner’s offices in Ontario will commission these documents for trans individuals for no charge; however, </text:span><text:span text:style-name="T17">the typical charge if applicable is $30-45.</text:span></text:p>
          </draw:text-box>
        </draw:frame>
        <draw:frame presentation:style-name="pr22" draw:text-style-name="P25" draw:layer="layout" svg:width="16.6cm" svg:height="1.533cm" svg:x="1.9cm" svg:y="4.367cm" presentation:class="title" presentation:user-transformed="true">
          <draw:text-box>
            <text:p text:style-name="P7"><text:span text:style-name="T20">Commissioning</text:span></text:p>
          </draw:text-box>
        </draw:frame>
        <anim:par presentation:node-type="timing-root">
          <anim:par smil:begin="id10.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10" presentation:class="page"/>
          <draw:frame presentation:style-name="pr5" draw:text-style-name="P2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xml:id="id11" draw:id="id11">
        <office:forms form:automatic-focus="false" form:apply-design-mode="false"/>
        <draw:custom-shape draw:style-name="gr13"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4cm" presentation:class="title" presentation:user-transformed="true">
          <draw:text-box>
            <text:p text:style-name="P7"><text:span text:style-name="T11">Ontario legal name changes</text:span></text:p>
          </draw:text-box>
        </draw:frame>
        <draw:frame presentation:style-name="pr24" draw:text-style-name="P17" draw:layer="layout" svg:width="24cm" svg:height="7.121cm" svg:x="2cm" svg:y="6.437cm">
          <draw:text-box>
            <text:p text:style-name="P15"><text:span text:style-name="T26">If possible, we recommend sending the entire application in a tracked envelope using Canada Post, to ease the stress of your application getting lost in the mail, and to allow for an update when it is likely beginning to be processed.</text:span></text:p>
            <text:p text:style-name="P16"><text:span text:style-name="T28">Send your completed form, payment, and required documents to:</text:span></text:p>
            <text:p text:style-name="P16"><text:span text:style-name="T29">Office of the Registrar General</text:span><text:span text:style-name="T29"><text:line-break/></text:span><text:span text:style-name="T29">P.O. Box 3000</text:span><text:span text:style-name="T29"><text:line-break/></text:span><text:span text:style-name="T29">189 Red River Road</text:span><text:span text:style-name="T29"><text:line-break/></text:span><text:span text:style-name="T29">Thunder Bay, ON</text:span><text:span text:style-name="T29"><text:line-break/></text:span><text:span text:style-name="T29">P7B 5W0</text:span></text:p>
          </draw:text-box>
        </draw:frame>
        <draw:frame presentation:style-name="pr22" draw:text-style-name="P25" draw:layer="layout" svg:width="16.6cm" svg:height="1.533cm" svg:x="1.9cm" svg:y="4.267cm" presentation:class="title" presentation:user-transformed="true">
          <draw:text-box>
            <text:p text:style-name="P7"><text:span text:style-name="T20">Submitting your application</text:span></text:p>
          </draw:text-box>
        </draw:frame>
        <anim:par presentation:node-type="timing-root">
          <anim:par smil:begin="id11.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11" presentation:class="page"/>
          <draw:frame presentation:style-name="pr5" draw:text-style-name="P2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xml:id="id12" draw:id="id12">
        <office:forms form:automatic-focus="false" form:apply-design-mode="false"/>
        <draw:custom-shape draw:style-name="gr13"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4cm" presentation:class="title" presentation:user-transformed="true">
          <draw:text-box>
            <text:p text:style-name="P7"><text:span text:style-name="T11">Ontario legal name changes</text:span></text:p>
          </draw:text-box>
        </draw:frame>
        <draw:frame presentation:style-name="pr25" draw:text-style-name="P17" draw:layer="layout" svg:width="14.5cm" svg:height="7.348cm" svg:x="2cm" svg:y="6.237cm">
          <draw:text-box>
            <text:p text:style-name="P15"><text:span text:style-name="T30">If it is more accessible for you to submit the application in person and you are located in Toronto, you can bring your completed form, payment, and required documents to:</text:span></text:p>
            <text:p text:style-name="P15"><text:span text:style-name="T30"/></text:p>
            <text:p text:style-name="P15"><text:span text:style-name="T31">ServiceOntario</text:span></text:p>
            <text:p text:style-name="P15"><text:span text:style-name="T31">47 Sheppard Avenue East, Unit 417, 4th Floor</text:span></text:p>
            <text:p text:style-name="P15"><text:span text:style-name="T31">Toronto, ON</text:span></text:p>
            <text:p text:style-name="P15"><text:span text:style-name="T31">M2N 5N1</text:span></text:p>
            <text:p text:style-name="P15"><text:span text:style-name="T28"/></text:p>
            <text:p text:style-name="P15"><text:span text:style-name="T30">If your application is complete and accurate, </text:span><text:span text:style-name="T32">you should receive a certificate of name change in 18-24 weeks.</text:span><text:span text:style-name="T30"> This document will show your previous name and your new name. </text:span><text:span text:style-name="T32">You can use this certificate to change your name on other personal documents.</text:span></text:p>
          </draw:text-box>
        </draw:frame>
        <draw:frame presentation:style-name="pr22" draw:text-style-name="P25" draw:layer="layout" svg:width="16.6cm" svg:height="1.533cm" svg:x="1.9cm" svg:y="4.267cm" presentation:class="title" presentation:user-transformed="true">
          <draw:text-box>
            <text:p text:style-name="P7"><text:span text:style-name="T20">Submitting your application</text:span></text:p>
          </draw:text-box>
        </draw:frame>
        <draw:frame draw:name="Google Shape;212;p13" draw:style-name="gr18" draw:text-style-name="P6" draw:layer="layout" svg:width="9.601cm" svg:height="5.263cm" svg:x="16.6cm" svg:y="4.7cm">
          <draw:image xlink:href="Pictures/10000000000004AF000004B0F51973FA.jpg" xlink:type="simple" xlink:show="embed" xlink:actuate="onLoad" draw:mime-type="image/jpeg">
            <text:p/>
          </draw:image>
        </draw:frame>
        <draw:custom-shape draw:style-name="gr19" draw:text-style-name="P22" draw:layer="layout" svg:width="8.3cm" svg:height="3.7cm" svg:x="18.5cm" svg:y="10.7cm">
          <text:p/>
          <draw:enhanced-geometry svg:viewBox="0 0 21600 21600" draw:mirror-horizontal="false" draw:mirror-vertical="false" draw:type="rectangle" draw:enhanced-path="M 0 0 L 21600 0 21600 21600 0 21600 0 0 Z N"/>
        </draw:custom-shape>
        <draw:frame draw:style-name="gr20" draw:text-style-name="P28" draw:layer="layout" svg:width="7.7cm" svg:height="3.347cm" svg:x="18.9cm" svg:y="10.913cm">
          <draw:text-box>
            <text:p text:style-name="P9"><text:span text:style-name="T33">If possible, I recommend sending </text:span><text:span text:style-name="T34">the entire application in a tracked envelope using Canada Pos</text:span><text:span text:style-name="T33">t, to ease the stress of your application getting lost in the mail, and to allow for an update when it is likely beginning to be processed. </text:span></text:p>
          </draw:text-box>
        </draw:frame>
        <anim:par presentation:node-type="timing-root">
          <anim:par smil:begin="id12.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12" presentation:class="page"/>
          <draw:frame presentation:style-name="pr5" draw:text-style-name="P2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xml:id="id13" draw:id="id13">
        <office:forms form:automatic-focus="false" form:apply-design-mode="false"/>
        <draw:custom-shape draw:style-name="gr13"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4cm" presentation:class="title" presentation:user-transformed="true">
          <draw:text-box>
            <text:p text:style-name="P7"><text:span text:style-name="T11">Ontario legal name changes</text:span></text:p>
          </draw:text-box>
        </draw:frame>
        <draw:frame presentation:style-name="pr26" draw:text-style-name="P29" draw:layer="layout" svg:width="18.1cm" svg:height="7.669cm" svg:x="1.9cm" svg:y="6.037cm">
          <draw:text-box>
            <text:p text:style-name="P15"><text:span text:style-name="T35">- </text:span><text:span text:style-name="T36">Give yourself time</text:span><text:span text:style-name="T35"> (it will likely take several weeks to gather all the information you need, and to complete, double-check, and submit the forms)</text:span></text:p>
            <text:p text:style-name="P15"><text:span text:style-name="T35">- </text:span><text:span text:style-name="T36">Print clearly</text:span><text:span text:style-name="T35"> using a pen with blue or black ink</text:span></text:p>
            <text:p text:style-name="P15"><text:span text:style-name="T35">- </text:span><text:span text:style-name="T36">Do not use correction fluid</text:span><text:span text:style-name="T35"> on any forms</text:span></text:p>
            <text:p text:style-name="P15"><text:span text:style-name="T35"/></text:p>
            <text:p text:style-name="P15"><text:span text:style-name="T35">- </text:span><text:span text:style-name="T36">If you make a mistake or want to change information</text:span><text:span text:style-name="T35">, you must do the following:</text:span></text:p>
            <text:p text:style-name="P15"><text:span text:style-name="T35"><text:s text:c="3"/>- Put brackets around the wrong information</text:span></text:p>
            <text:p text:style-name="P15"><text:span text:style-name="T35"><text:s text:c="3"/>- Enter the correct information</text:span></text:p>
            <text:p text:style-name="P15"><text:span text:style-name="T35"><text:s text:c="3"/>- Put your initials beside each change</text:span></text:p>
            <text:p text:style-name="P15"><text:span text:style-name="T35"><text:s text:c="3"/>- Have the commissioner initial each change before it is sworn</text:span></text:p>
          </draw:text-box>
        </draw:frame>
        <draw:frame presentation:style-name="pr22" draw:text-style-name="P25" draw:layer="layout" svg:width="16.6cm" svg:height="1.533cm" svg:x="2cm" svg:y="4.167cm" presentation:class="title" presentation:user-transformed="true">
          <draw:text-box>
            <text:p text:style-name="P7"><text:span text:style-name="T20">Some suggestions</text:span></text:p>
          </draw:text-box>
        </draw:frame>
        <draw:frame draw:name="Google Shape;223;p14" draw:style-name="gr21" draw:text-style-name="P6" draw:layer="layout" svg:width="6.5cm" svg:height="12.188cm" svg:x="21cm" svg:y="0.636cm">
          <draw:image xlink:href="Pictures/10000000000009C40000060C6632020B.jpg" xlink:type="simple" xlink:show="embed" xlink:actuate="onLoad" draw:mime-type="image/jpeg">
            <text:p/>
          </draw:image>
          <svg:desc>A wall covered with sticky notes.</svg:desc>
        </draw:frame>
        <anim:par presentation:node-type="timing-root">
          <anim:par smil:begin="id13.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13" presentation:class="page"/>
          <draw:frame presentation:style-name="pr5" draw:text-style-name="P2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xml:id="id14" draw:id="id14">
        <office:forms form:automatic-focus="false" form:apply-design-mode="false"/>
        <draw:custom-shape draw:style-name="gr13"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Ontario legal name changes</text:span></text:p>
          </draw:text-box>
        </draw:frame>
        <draw:frame presentation:style-name="pr27" draw:text-style-name="P30" draw:layer="layout" svg:width="24.1cm" svg:height="7.863cm" svg:x="1.9cm" svg:y="6.137cm">
          <draw:text-box>
            <text:list text:style-name="L2">
              <text:list-item>
                <text:p text:style-name="P15"><text:span text:style-name="T37">Fill out the Application to Change an Adult's Name</text:span><text:span text:style-name="T38"> (all relevant sections, excluding Guarantor’s Statement) and Request for Non-Publication in the Ontario Gazette (DO NOT SIGN YET)</text:span></text:p>
              </text:list-item>
              <text:list-item>
                <text:p text:style-name="P15"><text:span text:style-name="T37">Collect all required identification</text:span><text:span text:style-name="T38"> photocopies and/or original documents, including translations, if necessary</text:span></text:p>
              </text:list-item>
              <text:list-item>
                <text:p text:style-name="P15"><text:span text:style-name="T37">Receive consent from every person who has legal custody of you</text:span><text:span text:style-name="T38">, if applicable</text:span></text:p>
              </text:list-item>
              <text:list-item>
                <text:p text:style-name="P15"><text:span text:style-name="T37">Give your partner/spouse notice</text:span><text:span text:style-name="T38"> that you are changing your name, if applicable</text:span></text:p>
              </text:list-item>
              <text:list-item>
                <text:p text:style-name="P15"><text:span text:style-name="T37">Receive a police check</text:span><text:span text:style-name="T38">, if necessary</text:span></text:p>
              </text:list-item>
              <text:list-item>
                <text:p text:style-name="P15"><text:span text:style-name="T37">Secure the $137 + shipping</text:span><text:span text:style-name="T38"> to submit the application</text:span></text:p>
              </text:list-item>
              <text:list-item>
                <text:p text:style-name="P15"><text:span text:style-name="T38">Secure a guarantor and have them </text:span><text:span text:style-name="T37">fill out the Guarantor’s statement</text:span></text:p>
              </text:list-item>
              <text:list-item>
                <text:p text:style-name="P15"><text:span text:style-name="T37">Make an appointment with a commissioner</text:span><text:span text:style-name="T38">, having them witness you sign and then commission the document</text:span></text:p>
              </text:list-item>
              <text:list-item>
                <text:p text:style-name="P15"><text:span text:style-name="T37">Mail the document</text:span><text:span text:style-name="T38"> to the Office of the Registrar General in Thunder Bay, ON </text:span><text:span text:style-name="T37">or submit in person</text:span><text:span text:style-name="T38"> in Toronto, ON</text:span></text:p>
              </text:list-item>
            </text:list>
          </draw:text-box>
        </draw:frame>
        <draw:frame presentation:style-name="pr22" draw:text-style-name="P25" draw:layer="layout" svg:width="16.6cm" svg:height="1.533cm" svg:x="2cm" svg:y="4.267cm" presentation:class="title" presentation:user-transformed="true">
          <draw:text-box>
            <text:p text:style-name="P7"><text:span text:style-name="T20">Checklist</text:span></text:p>
          </draw:text-box>
        </draw:frame>
        <anim:par presentation:node-type="timing-root">
          <anim:par smil:begin="id14.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14" presentation:class="page"/>
          <draw:frame presentation:style-name="pr5" draw:text-style-name="P2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xml:id="id15" draw:id="id15">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Ontario birth certificates</text:span></text:p>
          </draw:text-box>
        </draw:frame>
        <draw:frame presentation:style-name="pr28" draw:text-style-name="P31" draw:layer="layout" svg:width="15.5cm" svg:height="2.557cm" svg:x="2cm" svg:y="4.661cm" presentation:class="subtitle" presentation:user-transformed="true">
          <draw:text-box>
            <text:p text:style-name="P15"><text:span text:style-name="T15">https://www.ontario.ca/page/changing-your-sex-designation-your-birth-registration-and-birth-certificate</text:span></text:p>
            <text:p text:style-name="P15"><text:span text:style-name="T15"><text:a xlink:href="https://idguide.ca/on/birth" xlink:type="simple">https://idguide.ca/on/birth</text:a></text:span></text:p>
          </draw:text-box>
        </draw:frame>
        <draw:frame presentation:style-name="pr29" draw:text-style-name="P24" draw:layer="layout" svg:width="13.5cm" svg:height="6.339cm" svg:x="2cm" svg:y="7.061cm">
          <draw:text-box>
            <text:p text:style-name="P15"><text:span text:style-name="T19">To update the sex designation on your Ontario birth registration or certificate, you will need to complete the </text:span><text:span text:style-name="T21">Ontario Application for Change of Sex Designation on a Birth Registration of an Adult (11325E)</text:span><text:span text:style-name="T19"> as well as the </text:span><text:span text:style-name="T21">Statutory Declaration for a Change of Sex Designation on a Birth Registration of an Adult (11324E)</text:span><text:span text:style-name="T19">.</text:span></text:p>
            <text:p text:style-name="P15"><text:span text:style-name="T19"/></text:p>
            <text:p text:style-name="P15"><text:span text:style-name="T19">The application is two pages long, and the declaration is a single page. </text:span><text:span text:style-name="T21">They can be submitted at the same time as your Ontario name change</text:span><text:span text:style-name="T19">, if applicable.</text:span></text:p>
          </draw:text-box>
        </draw:frame>
        <draw:custom-shape draw:style-name="gr9" draw:text-style-name="P22"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10" draw:text-style-name="P23" draw:layer="layout" svg:width="9.5cm" svg:height="2.487cm" svg:x="17.1cm" svg:y="11.213cm">
          <draw:text-box>
            <text:p text:style-name="P9"><text:span text:style-name="T18">Note: This is based on 2022 edition of the application. Always make sure you are filling out the most recent version of any given document.</text:span></text:p>
          </draw:text-box>
        </draw:frame>
        <draw:frame draw:name="Google Shape;243;p16" draw:style-name="gr3" draw:text-style-name="P6" draw:layer="layout" svg:width="8.985cm" svg:height="5.5cm" svg:x="17.289cm" svg:y="5cm">
          <draw:image xlink:href="Pictures/10000001000003A80000023DA47B4F51.png" xlink:type="simple" xlink:show="embed" xlink:actuate="onLoad" draw:mime-type="image/png">
            <text:p/>
          </draw:image>
        </draw:frame>
        <anim:par presentation:node-type="timing-root">
          <anim:par smil:begin="id15.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15" presentation:class="page"/>
          <draw:frame presentation:style-name="pr5" draw:text-style-name="P2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xml:id="id16" draw:id="id16">
        <office:forms form:automatic-focus="false" form:apply-design-mode="false"/>
        <draw:custom-shape draw:style-name="gr13"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4cm" presentation:class="title" presentation:user-transformed="true">
          <draw:text-box>
            <text:p text:style-name="P7"><text:span text:style-name="T11">Ontario birth certificates</text:span></text:p>
          </draw:text-box>
        </draw:frame>
        <draw:frame presentation:style-name="pr30" draw:text-style-name="P32" draw:layer="layout" svg:width="19.1cm" svg:height="7.669cm" svg:x="1.9cm" svg:y="6.137cm">
          <draw:text-box>
            <text:p text:style-name="P15"><text:span text:style-name="T30">When changing your sex designation, </text:span><text:span text:style-name="T32">you have the options of M (male), F (female), or X (gender neutral) or not to display the sex designation field</text:span><text:span text:style-name="T30"> at all. Depending on your chosen designation, your process will be different.</text:span></text:p>
            <text:p text:style-name="P15"><text:span text:style-name="T30"/></text:p>
            <text:p text:style-name="P15"><text:span text:style-name="T30">You must be </text:span><text:span text:style-name="T32">born in Ontario, and 16 years of age or older</text:span><text:span text:style-name="T39"> </text:span><text:span text:style-name="T30">to complete this application. Along with the forms, you must provide:</text:span></text:p>
            <text:p text:style-name="P15"><text:span text:style-name="T30"/></text:p>
            <text:list text:style-name="L3">
              <text:list-item>
                <text:p text:style-name="P15"><text:span text:style-name="T32">A letter from a licensed doctor or psychologist</text:span><text:span text:style-name="T30"> in good-standing, written on the doctor’s letterhead, stating that the doctor has examined or treated you and they can attest that the updated designation is appropriate, and signed by the doctor</text:span></text:p>
              </text:list-item>
              <text:list-item>
                <text:p text:style-name="P15"><text:span text:style-name="T32">All previously issued short- and long-form birth certificates</text:span><text:span text:style-name="T30"> and certified copies of your birth registration</text:span></text:p>
              </text:list-item>
              <text:list-item>
                <text:p text:style-name="P15"><text:span text:style-name="T32">A completed application form and declaration</text:span><text:span text:style-name="T30">, along with any applicable fees</text:span></text:p>
              </text:list-item>
            </text:list>
          </draw:text-box>
        </draw:frame>
        <draw:frame presentation:style-name="pr22" draw:text-style-name="P25" draw:layer="layout" svg:width="16.6cm" svg:height="1.533cm" svg:x="1.9cm" svg:y="4.267cm" presentation:class="title" presentation:user-transformed="true">
          <draw:text-box>
            <text:p text:style-name="P7"><text:span text:style-name="T20">Requirements</text:span></text:p>
          </draw:text-box>
        </draw:frame>
        <draw:frame draw:name="Google Shape;140;p 1" draw:style-name="gr11" draw:text-style-name="P6" draw:layer="layout" svg:width="5.5cm" svg:height="9.965cm" svg:x="22cm" svg:y="0.636cm">
          <draw:image xlink:href="Pictures/10000000000009C4000006827CD3279B.jpg" xlink:type="simple" xlink:show="embed" xlink:actuate="onLoad" draw:mime-type="image/jpeg">
            <text:p/>
          </draw:image>
          <svg:desc>Pen placed on top of a signature line</svg:desc>
        </draw:frame>
        <anim:par presentation:node-type="timing-root">
          <anim:par smil:begin="id16.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16" presentation:class="page"/>
          <draw:frame presentation:style-name="pr5" draw:text-style-name="P2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xml:id="id17" draw:id="id17">
        <office:forms form:automatic-focus="false" form:apply-design-mode="false"/>
        <draw:custom-shape draw:style-name="gr13"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4cm" presentation:class="title" presentation:user-transformed="true">
          <draw:text-box>
            <text:p text:style-name="P7"><text:span text:style-name="T11">Ontario birth certificates</text:span></text:p>
          </draw:text-box>
        </draw:frame>
        <draw:frame presentation:style-name="pr31" draw:text-style-name="P33" draw:layer="layout" svg:width="15.6cm" svg:height="4.863cm" svg:x="1.9cm" svg:y="6.137cm">
          <draw:text-box>
            <text:p text:style-name="P15"><text:span text:style-name="T40">Just like the name change application, you must sign the statutory declaration of this application in front of a commissioner for taking affidavits, so please factor that into your plan as you begin to work through your documents.</text:span></text:p>
          </draw:text-box>
        </draw:frame>
        <draw:frame presentation:style-name="pr22" draw:text-style-name="P25" draw:layer="layout" svg:width="16.6cm" svg:height="1.533cm" svg:x="1.9cm" svg:y="4.267cm" presentation:class="title" presentation:user-transformed="true">
          <draw:text-box>
            <text:p text:style-name="P7"><text:span text:style-name="T20">Commissioning</text:span></text:p>
          </draw:text-box>
        </draw:frame>
        <draw:frame draw:name="Google Shape;260;p18" draw:style-name="gr22" draw:text-style-name="P6" draw:layer="layout" svg:width="7.307cm" svg:height="9.864cm" svg:x="18.193cm" svg:y="1cm">
          <draw:image xlink:href="Pictures/10000000000009C400000682CD22342F.jpg" xlink:type="simple" xlink:show="embed" xlink:actuate="onLoad" draw:mime-type="image/jpeg">
            <text:p/>
          </draw:image>
          <svg:desc>Hand with a gavel</svg:desc>
        </draw:frame>
        <draw:frame draw:name="Google Shape;262;p18" draw:style-name="gr23" draw:text-style-name="P6" draw:layer="layout" svg:width="9.5cm" svg:height="4.206cm" svg:x="2cm" svg:y="9.5cm">
          <draw:image xlink:href="Pictures/10000001000003A50000024DC0355A97.png" xlink:type="simple" xlink:show="embed" xlink:actuate="onLoad" draw:mime-type="image/png">
            <text:p/>
          </draw:image>
        </draw:frame>
        <anim:par presentation:node-type="timing-root">
          <anim:par smil:begin="id17.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17" presentation:class="page"/>
          <draw:frame presentation:style-name="pr5" draw:text-style-name="P2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xml:id="id18" draw:id="id18">
        <office:forms form:automatic-focus="false" form:apply-design-mode="false"/>
        <draw:custom-shape draw:style-name="gr13"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4cm" presentation:class="title" presentation:user-transformed="true">
          <draw:text-box>
            <text:p text:style-name="P7"><text:span text:style-name="T11">Ontario birth certificates</text:span></text:p>
          </draw:text-box>
        </draw:frame>
        <draw:frame presentation:style-name="pr32" draw:text-style-name="P24" draw:layer="layout" svg:width="14.1cm" svg:height="6.612cm" svg:x="2cm" svg:y="6.237cm">
          <draw:text-box>
            <text:p text:style-name="P15"><text:span text:style-name="T22">While there used to be a fee for changing your sex designation, </text:span><text:span text:style-name="T21">ServiceOntario began waiving this fee back in 2021</text:span><text:span text:style-name="T22">. They have continued to periodically extend the window for free applications, and currently do not list a fee, however </text:span><text:span text:style-name="T21">please make sure to double-check this policy is still in standing</text:span><text:span text:style-name="T22"> at the time of submission.</text:span></text:p>
            <text:p text:style-name="P15"><text:span text:style-name="T22"/></text:p>
            <text:p text:style-name="P15"><text:span text:style-name="T22">There also may be fees applicable for copies of short- or long-form birth certificates or registrations (unless submitting at the same time as an Ontario name change for an individual born in Ontario, which will be included in that fee).</text:span></text:p>
          </draw:text-box>
        </draw:frame>
        <draw:frame presentation:style-name="pr22" draw:text-style-name="P25" draw:layer="layout" svg:width="16.6cm" svg:height="1.533cm" svg:x="2cm" svg:y="4.267cm" presentation:class="title" presentation:user-transformed="true">
          <draw:text-box>
            <text:p text:style-name="P7"><text:span text:style-name="T20">Submitting your application</text:span></text:p>
          </draw:text-box>
        </draw:frame>
        <draw:custom-shape draw:style-name="gr24" draw:text-style-name="P22" draw:layer="layout" svg:width="9.8cm" svg:height="8.9cm" svg:x="17cm" svg:y="5.5cm">
          <text:p/>
          <draw:enhanced-geometry svg:viewBox="0 0 21600 21600" draw:mirror-horizontal="false" draw:mirror-vertical="false" draw:type="rectangle" draw:enhanced-path="M 0 0 L 21600 0 21600 21600 0 21600 0 0 Z N"/>
        </draw:custom-shape>
        <draw:frame draw:style-name="gr25" draw:text-style-name="P34" draw:layer="layout" svg:width="9cm" svg:height="7.991cm" svg:x="17.5cm" svg:y="5.9cm">
          <draw:text-box>
            <text:p text:style-name="P9"><text:span text:style-name="T41">You can mail your application to:</text:span></text:p>
            <text:p text:style-name="P9"><text:span text:style-name="T41">Office of the Registrar General</text:span></text:p>
            <text:p text:style-name="P9"><text:span text:style-name="T41">189 Red River Road, P.O. Box 3000</text:span></text:p>
            <text:p text:style-name="P9"><text:span text:style-name="T41">Thunder Bay, Ontario</text:span></text:p>
            <text:p text:style-name="P9"><text:span text:style-name="T41">P7B 5W0</text:span></text:p>
            <text:p text:style-name="P9"><text:span text:style-name="T41"/></text:p>
            <text:p text:style-name="P9"><text:span text:style-name="T41">If mailing at the same time as a name change, you can mail all documents in one envelope to the address listed under that section.</text:span></text:p>
            <text:p text:style-name="P9"><text:span text:style-name="T41"/></text:p>
            <text:p text:style-name="P9"><text:span text:style-name="T41">If being filed without a name change, I recommend a tracked envelope as with that application. Photocopied, faxed, or e-signed documents will not be accepted.</text:span></text:p>
          </draw:text-box>
        </draw:frame>
        <anim:par presentation:node-type="timing-root">
          <anim:par smil:begin="id18.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18" presentation:class="page"/>
          <draw:frame presentation:style-name="pr5" draw:text-style-name="P2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xml:id="id19" draw:id="id19">
        <office:forms form:automatic-focus="false" form:apply-design-mode="false"/>
        <draw:custom-shape draw:style-name="gr13"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4cm" presentation:class="title" presentation:user-transformed="true">
          <draw:text-box>
            <text:p text:style-name="P7"><text:span text:style-name="T11">Ontario birth certificates</text:span></text:p>
          </draw:text-box>
        </draw:frame>
        <draw:frame presentation:style-name="pr33" draw:text-style-name="P24" draw:layer="layout" svg:width="12.5cm" svg:height="6.612cm" svg:x="2cm" svg:y="6.237cm">
          <draw:text-box>
            <text:p text:style-name="P15"><text:span text:style-name="T22">Birth certificates with a sex designation of X or no sex displayed are recognized by the Government of Ontario, who claim they do not endorse any rejection of valid Ontario birth certificates by any official body. However, unfortunately they also claim they cannot guarantee that these documents will be accepted by organizations in Ontario or in other jurisdictions.</text:span></text:p>
            <text:p text:style-name="P15"><text:span text:style-name="T22"/></text:p>
            <text:p text:style-name="P15"><text:span text:style-name="T22">If your application is complete and all requirements are met, </text:span><text:span text:style-name="T21">you should receive your new birth certificate or registration in 18-24 weeks.</text:span></text:p>
          </draw:text-box>
        </draw:frame>
        <draw:frame presentation:style-name="pr22" draw:text-style-name="P25" draw:layer="layout" svg:width="16.6cm" svg:height="1.533cm" svg:x="2cm" svg:y="4.267cm" presentation:class="title" presentation:user-transformed="true">
          <draw:text-box>
            <text:p text:style-name="P7"><text:span text:style-name="T20">Important considerations</text:span></text:p>
          </draw:text-box>
        </draw:frame>
        <draw:frame draw:name="Google Shape;281;p20" draw:style-name="gr3" draw:text-style-name="P6" draw:layer="layout" svg:width="8.1cm" svg:height="11.394cm" svg:x="18.1cm" svg:y="2.49cm">
          <draw:image xlink:href="Pictures/10000001000001AC0000025A6DED93A5.png" xlink:type="simple" xlink:show="embed" xlink:actuate="onLoad" draw:mime-type="image/png">
            <text:p/>
          </draw:image>
        </draw:frame>
        <anim:par presentation:node-type="timing-root">
          <anim:par smil:begin="id19.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19" presentation:class="page"/>
          <draw:frame presentation:style-name="pr5" draw:text-style-name="P2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xml:id="id20" draw:id="id20">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34" draw:text-style-name="P14" draw:layer="layout" svg:width="24.6cm" svg:height="1.682cm" svg:x="1.9cm" svg:y="2.609cm" presentation:class="title" presentation:user-transformed="true">
          <draw:text-box>
            <text:p text:style-name="P7"><text:span text:style-name="T11">Driver’s licenses and photo cards</text:span></text:p>
          </draw:text-box>
        </draw:frame>
        <draw:frame presentation:style-name="pr35" draw:text-style-name="P31" draw:layer="layout" svg:width="24cm" svg:height="1.839cm" svg:x="2cm" svg:y="4.661cm" presentation:class="subtitle" presentation:user-transformed="true">
          <draw:text-box>
            <text:p text:style-name="P15"><text:span text:style-name="T15">https://www.ontario.ca/page/change-sex-designation-your-government-ids</text:span></text:p>
            <text:p text:style-name="P15"><text:span text:style-name="T15"><text:a xlink:href="https://idguide.ca/on/id" xlink:type="simple">https://idguide.ca/on/id</text:a></text:span></text:p>
          </draw:text-box>
        </draw:frame>
        <draw:frame presentation:style-name="pr36" draw:text-style-name="P36" draw:layer="layout" svg:width="24cm" svg:height="9.016cm" svg:x="2cm" svg:y="6.461cm">
          <draw:text-box>
            <text:p text:style-name="P35"><text:span text:style-name="T42">When updating the sex designation on your driver’s licence or photo card, </text:span><text:span text:style-name="T43">you have the options of M (male), F (female), or X (gender neutral)</text:span><text:span text:style-name="T42">. Depending on your chosen designation, your process will be different.</text:span></text:p>
            <text:p text:style-name="P35"><text:span text:style-name="T42"/></text:p>
            <text:p text:style-name="P35"><text:span text:style-name="T43">The driver’s license changes are free</text:span><text:span text:style-name="T42"> for anyone with an existing license. For those who do not drive, </text:span><text:span text:style-name="T43">the photo card comes with a $35 fee. </text:span></text:p>
            <text:p text:style-name="P35"><text:span text:style-name="T42"/></text:p>
            <text:p text:style-name="P35"><text:span text:style-name="T43">To change the sex designation on your driver’s licence to an X (gender neutral), you can simply visit a ServiceOntario</text:span><text:span text:style-name="T42">. You do not require any supporting documents.</text:span></text:p>
            <text:p text:style-name="P35"><text:span text:style-name="T42"/></text:p>
            <text:p text:style-name="P35"><text:span text:style-name="T43">For binary sex designation changes, you can go to a ServiceOntario and bring an original document that indicates the updated sex designation</text:span><text:span text:style-name="T42">. This can be your short or long-form birth certificate or a certified copy of a birth registration.</text:span></text:p>
            <text:p text:style-name="P35"><text:span text:style-name="T42"/></text:p>
            <text:p text:style-name="P35"><text:span text:style-name="T42">Please bear in mind that by law in Ontario, if you have a driver's license, you must notify the Ministry of Transportation within 6 days of legally changing your name (i.e., receiving your change of name certificate/updated birth certificate).</text:span></text:p>
          </draw:text-box>
        </draw:frame>
        <anim:par presentation:node-type="timing-root">
          <anim:par smil:begin="id20.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20" presentation:class="page"/>
          <draw:frame presentation:style-name="pr5" draw:text-style-name="P2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xml:id="id21" draw:id="id21">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34" draw:text-style-name="P14" draw:layer="layout" svg:width="24.6cm" svg:height="1.682cm" svg:x="1.9cm" svg:y="2.609cm" presentation:class="title" presentation:user-transformed="true">
          <draw:text-box>
            <text:p text:style-name="P7"><text:span text:style-name="T11">Driver’s licenses and photo cards</text:span></text:p>
          </draw:text-box>
        </draw:frame>
        <draw:frame presentation:style-name="pr37" draw:text-style-name="P32" draw:layer="layout" svg:width="17.5cm" svg:height="9.016cm" svg:x="2cm" svg:y="6.161cm">
          <draw:text-box>
            <text:p text:style-name="P15"><text:span text:style-name="T30">If you do not have a birth certificate or registration that represents the desired sex designation, you will need to bring the following two documents:</text:span></text:p>
            <text:p text:style-name="P15"><text:span text:style-name="T30"/></text:p>
            <text:list text:style-name="L3">
              <text:list-item>
                <text:p text:style-name="P15"><text:span text:style-name="T32">A letter from a licensed doctor or psychologist</text:span><text:span text:style-name="T30"> that is written on the doctor’s letterhead, states that the doctor has examined or treated you and they can attest that the updated designation is appropriate, and is signed by the doctor</text:span></text:p>
              </text:list-item>
              <text:list-item>
                <text:p text:style-name="P15"><text:span text:style-name="T32">A letter from you</text:span><text:span text:style-name="T30"> that includes the change you want to make, your full name and current address, your driver’s license number, and the name and address of the doctor or psychologist who has signed the other letter</text:span></text:p>
                <text:p text:style-name="P15"><text:span text:style-name="T30"/></text:p>
              </text:list-item>
            </text:list>
            <text:p text:style-name="P15"><text:span text:style-name="T32">Surgery is no longer required as a condition for sex designation changes.</text:span><text:span text:style-name="T30"> However, if you have had surgery, you are able to present documentation from a recognized specialist instead of a letter from a doctor or psychologist.</text:span></text:p>
          </draw:text-box>
        </draw:frame>
        <draw:frame presentation:style-name="pr22" draw:text-style-name="P25" draw:layer="layout" svg:width="16.6cm" svg:height="1.533cm" svg:x="2cm" svg:y="4.368cm" presentation:class="title" presentation:user-transformed="true">
          <draw:text-box>
            <text:p text:style-name="P7"><text:span text:style-name="T20">Other documentation</text:span></text:p>
          </draw:text-box>
        </draw:frame>
        <draw:frame draw:name="Google Shape;298;p22" draw:style-name="gr3" draw:text-style-name="P6" draw:layer="layout" svg:width="6cm" svg:height="3.781cm" svg:x="20.1cm" svg:y="5.019cm">
          <draw:image xlink:href="Pictures/100000000000011C000000B3AEBDB8BA.jpg" xlink:type="simple" xlink:show="embed" xlink:actuate="onLoad" draw:mime-type="image/jpeg">
            <text:p/>
          </draw:image>
        </draw:frame>
        <draw:frame draw:name="Google Shape;299;p22" draw:style-name="gr26" draw:text-style-name="P6" draw:layer="layout" svg:width="6cm" svg:height="3.781cm" svg:x="20.1cm" svg:y="9.5cm">
          <draw:image xlink:href="Pictures/10000000000005000000040037302F48.jpg" xlink:type="simple" xlink:show="embed" xlink:actuate="onLoad" draw:mime-type="image/jpeg">
            <text:p/>
          </draw:image>
        </draw:frame>
        <anim:par presentation:node-type="timing-root">
          <anim:par smil:begin="id21.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21" presentation:class="page"/>
          <draw:frame presentation:style-name="pr5" draw:text-style-name="P2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xml:id="id22" draw:id="id22">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Ontario health cards</text:span></text:p>
          </draw:text-box>
        </draw:frame>
        <draw:frame presentation:style-name="pr38" draw:text-style-name="P31" draw:layer="layout" svg:width="15.5cm" svg:height="2.557cm" svg:x="2cm" svg:y="4.661cm" presentation:class="subtitle" presentation:user-transformed="true">
          <draw:text-box>
            <text:p text:style-name="P15"><text:span text:style-name="T15">https://www.ontario.ca/page/replace-cancel-or-change-information-your-health-card#section-3</text:span></text:p>
            <text:p text:style-name="P15"><text:span text:style-name="T15"><text:a xlink:href="https://idguide.ca/on/health" xlink:type="simple">https://idguide.ca/on/health</text:a></text:span></text:p>
          </draw:text-box>
        </draw:frame>
        <draw:frame presentation:style-name="pr39" draw:text-style-name="P24" draw:layer="layout" svg:width="15cm" svg:height="6.339cm" svg:x="2cm" svg:y="7.061cm">
          <draw:text-box>
            <text:p text:style-name="P15"><text:span text:style-name="T22">To change your name on your health card, you must visit a ServiceOntario and bring a completed </text:span><text:span text:style-name="T21">Change of Information form (0280-82)</text:span><text:span text:style-name="T22"> as well as an original copy of </text:span><text:span text:style-name="T21">one of the following documents:</text:span></text:p>
            <text:p text:style-name="P15"><text:span text:style-name="T22"/></text:p>
            <text:list text:style-name="L3">
              <text:list-item>
                <text:p text:style-name="P15"><text:span text:style-name="T22">Canadian birth certificate</text:span></text:p>
              </text:list-item>
              <text:list-item>
                <text:p text:style-name="P15"><text:span text:style-name="T22">Canadian change of name certificate</text:span></text:p>
              </text:list-item>
              <text:list-item>
                <text:p text:style-name="P15"><text:span text:style-name="T22">citizenship/immigration status document in the name</text:span></text:p>
              </text:list-item>
            </text:list>
            <text:p text:style-name="P15"><text:span text:style-name="T22"/></text:p>
            <text:p text:style-name="P15"><text:span text:style-name="T21">Sex designation is no longer listed on health cards.</text:span></text:p>
          </draw:text-box>
        </draw:frame>
        <draw:frame draw:name="Google Shape;330;p25" draw:style-name="gr3" draw:text-style-name="P6" draw:layer="layout" svg:width="8.6cm" svg:height="4.848cm" svg:x="17.5cm" svg:y="8.463cm">
          <draw:image xlink:href="Pictures/1000000100000320000001C3ED20F732.png" xlink:type="simple" xlink:show="embed" xlink:actuate="onLoad" draw:mime-type="image/png">
            <text:p/>
          </draw:image>
        </draw:frame>
        <draw:frame draw:name="Google Shape;331;p25" draw:style-name="gr3" draw:text-style-name="P6" draw:layer="layout" svg:width="8.141cm" svg:height="5.233cm" svg:x="18cm" svg:y="2.7cm">
          <draw:image xlink:href="Pictures/10000001000002AB000001B71CC67715.png" xlink:type="simple" xlink:show="embed" xlink:actuate="onLoad" draw:mime-type="image/png">
            <text:p/>
          </draw:image>
        </draw:frame>
        <anim:par presentation:node-type="timing-root">
          <anim:par smil:begin="id22.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22" presentation:class="page"/>
          <draw:frame presentation:style-name="pr5" draw:text-style-name="P2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xml:id="id23" draw:id="id23">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Canadian passports</text:span></text:p>
          </draw:text-box>
        </draw:frame>
        <draw:frame presentation:style-name="pr40" draw:text-style-name="P31" draw:layer="layout" svg:width="24cm" svg:height="3.974cm" svg:x="2cm" svg:y="4.826cm" presentation:class="subtitle" presentation:user-transformed="true">
          <draw:text-box>
            <text:p text:style-name="P15"><text:span text:style-name="T15">https://www.canada.ca/en/immigration-refugees-citizenship/services/canadian-passports/new-adult-passport/required-documents-photos</text:span></text:p>
            <text:p text:style-name="P15"><text:span text:style-name="T15">https://www.canada.ca/en/immigration-refugees-citizenship/services/canadian-passports/change-sex</text:span></text:p>
            <text:p text:style-name="P15"><text:span text:style-name="T15">https://travel.gc.ca/travelling/health-safety/lgbt-travel</text:span></text:p>
            <text:p text:style-name="P15"><text:span text:style-name="T15"><text:a xlink:href="https://idguide.ca/passport" xlink:type="simple">https://idguide.ca/passport</text:a></text:span></text:p>
          </draw:text-box>
        </draw:frame>
        <draw:frame presentation:style-name="pr41" draw:text-style-name="P33" draw:layer="layout" svg:width="22.5cm" svg:height="6.612cm" svg:x="2cm" svg:y="9.4cm">
          <draw:text-box>
            <text:p text:style-name="P15"><text:span text:style-name="T40">There are </text:span><text:span text:style-name="T44">3 options for gender/sex identification</text:span><text:span text:style-name="T40"> on Canadian passports: </text:span><text:span text:style-name="T44">F (female), M (male), or X (another gender)</text:span><text:span text:style-name="T40">.</text:span></text:p>
            <text:p text:style-name="P15"><text:span text:style-name="T40"/></text:p>
            <text:p text:style-name="P15"><text:span text:style-name="T40">Depending on whether your supporting documents have the gender/sex identifier you want, </text:span><text:span text:style-name="T44">the application process for your passport will vary.</text:span></text:p>
          </draw:text-box>
        </draw:frame>
        <anim:par presentation:node-type="timing-root">
          <anim:par smil:begin="id23.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23" presentation:class="page"/>
          <draw:frame presentation:style-name="pr5" draw:text-style-name="P2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xml:id="id24" draw:id="id24">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Canadian passports</text:span></text:p>
          </draw:text-box>
        </draw:frame>
        <draw:frame presentation:style-name="pr42" draw:text-style-name="P37" draw:layer="layout" svg:width="24cm" svg:height="7.268cm" svg:x="2cm" svg:y="6.187cm">
          <draw:text-box>
            <text:p text:style-name="P15"><text:span text:style-name="T45">If your name or gender/sex identifier have already been changed</text:span><text:span text:style-name="T46"> on your proof of citizenship, </text:span><text:span text:style-name="T45">you are not eligible for the Canadian passport renewa</text:span><text:span text:style-name="T46">l process and will need to </text:span><text:span text:style-name="T45">apply for a brand new passport</text:span><text:span text:style-name="T46">.</text:span></text:p>
            <text:p text:style-name="P15"><text:span text:style-name="T46"/></text:p>
            <text:p text:style-name="P15"><text:span text:style-name="T46">You can do so by filling out the </text:span><text:span text:style-name="T45">Adult General Passport Application (pptc-153)</text:span><text:span text:style-name="T46"> and providing the required proof of citizenship. Learn more about passport applications at this link.</text:span></text:p>
            <text:p text:style-name="P15"><text:span text:style-name="T46"/></text:p>
            <text:p text:style-name="P15"><text:span text:style-name="T45">You will not need to provide any additional documentation</text:span><text:span text:style-name="T46"> of your new gender/sex identifier if:</text:span></text:p>
            <text:p text:style-name="P15"><text:span text:style-name="T46"/></text:p>
            <text:p text:style-name="P15"><text:span text:style-name="T46">- your proof of citizenship (such as a Canadian birth certificate or Canadian citizenship certificate), your proof of immigration status, or your previous passport has the gender/sex identifier that you want for your new passport</text:span></text:p>
            <text:p text:style-name="P15"><text:span text:style-name="T46">- your previous passport has the X marker</text:span></text:p>
          </draw:text-box>
        </draw:frame>
        <draw:frame presentation:style-name="pr43" draw:text-style-name="P25" draw:layer="layout" svg:width="18.5cm" svg:height="1.719cm" svg:x="2cm" svg:y="4.3cm" presentation:class="title" presentation:user-transformed="true">
          <draw:text-box>
            <text:p text:style-name="P7"><text:span text:style-name="T20">Process with supporting documents</text:span></text:p>
          </draw:text-box>
        </draw:frame>
        <anim:par presentation:node-type="timing-root">
          <anim:par smil:begin="id24.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24" presentation:class="page"/>
          <draw:frame presentation:style-name="pr5" draw:text-style-name="P2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xml:id="id25" draw:id="id25">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Canadian passports</text:span></text:p>
          </draw:text-box>
        </draw:frame>
        <draw:frame presentation:style-name="pr44" draw:text-style-name="P38" draw:layer="layout" svg:width="24cm" svg:height="2.313cm" svg:x="2cm" svg:y="6.087cm">
          <draw:text-box>
            <text:p text:style-name="P16"><text:span text:style-name="T47">If your gender/sex identifier has not been updated on your proof of citizenship, you will need to provide a completed</text:span><text:span text:style-name="T48"> Sex or Gender Identifier Update Request Form (pptc-643)</text:span><text:span text:style-name="T47"> along with your application.</text:span></text:p>
          </draw:text-box>
        </draw:frame>
        <draw:frame presentation:style-name="pr45" draw:text-style-name="P25" draw:layer="layout" svg:width="21.5cm" svg:height="1.943cm" svg:x="2cm" svg:y="4.2cm" presentation:class="title" presentation:user-transformed="true">
          <draw:text-box>
            <text:p text:style-name="P7"><text:span text:style-name="T20">Process without supporting documents</text:span></text:p>
          </draw:text-box>
        </draw:frame>
        <draw:frame presentation:style-name="pr45" draw:text-style-name="P25" draw:layer="layout" svg:width="21.5cm" svg:height="1.943cm" svg:x="2cm" svg:y="8.2cm" presentation:class="title" presentation:user-transformed="true">
          <draw:text-box>
            <text:p text:style-name="P7"><text:span text:style-name="T20">Important considerations</text:span></text:p>
          </draw:text-box>
        </draw:frame>
        <draw:frame presentation:style-name="pr46" draw:text-style-name="P38" draw:layer="layout" svg:width="24cm" svg:height="2.641cm" svg:x="2cm" svg:y="10.187cm">
          <draw:text-box>
            <text:p text:style-name="P16"><text:span text:style-name="T47">Unfortunately, the Government of Canada states they cannot guarantee that other countries you visit or travel through will accept the sex or gender identifier on your Canadian passport, especially in regards to the X marker, and you may still be asked to provide your sex as either male or female when travelling.</text:span></text:p>
          </draw:text-box>
        </draw:frame>
        <anim:par presentation:node-type="timing-root">
          <anim:par smil:begin="id25.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25" presentation:class="page"/>
          <draw:frame presentation:style-name="pr5" draw:text-style-name="P2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xml:id="id26" draw:id="id26">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Permanent Residency cards</text:span></text:p>
          </draw:text-box>
        </draw:frame>
        <draw:frame presentation:style-name="pr47" draw:text-style-name="P40" draw:layer="layout" svg:width="24cm" svg:height="7.661cm" svg:x="2cm" svg:y="6.039cm">
          <draw:text-box>
            <text:p text:style-name="P39"><text:span text:style-name="T28">If you need to update the name on your permanent resident card, you are not eligible for a reissued card, and must apply for a new card. You can do so by filling out the PR Card Application (IMM 5445).</text:span></text:p>
            <text:p text:style-name="P39"><text:span text:style-name="T28">In addition to the identity documents requested in Step 1 of the online PR Card Application, you will need to provide a copy of your Record of Landing (IMM 1000) or Confirmation of Permanent Residence (IMM 5292 or IMM 5688), as well as a legal document proving your name change (such as the Ontario Change of Name certificate).</text:span></text:p>
            <text:p text:style-name="P39"><text:span text:style-name="T28">If your name change document was not issued by a province within Canada, then you will also need to provide a provincial I.D. in the name requested (including a driver's license/photo card or a health card).</text:span></text:p>
          </draw:text-box>
        </draw:frame>
        <draw:frame draw:style-name="gr27" draw:text-style-name="P41" draw:layer="layout" svg:width="24cm" svg:height="1.213cm" svg:x="1.8cm" svg:y="4.687cm">
          <draw:text-box>
            <text:p><text:span text:style-name="T15"><text:a xlink:href="https://idguide.ca/pr" xlink:type="simple">https://idguide.ca/pr</text:a></text:span></text:p>
          </draw:text-box>
        </draw:frame>
        <anim:par presentation:node-type="timing-root">
          <anim:par smil:begin="id26.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26" presentation:class="page"/>
          <draw:frame presentation:style-name="pr5" draw:text-style-name="P2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xml:id="id27" draw:id="id27">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Social Insurance Registry</text:span></text:p>
          </draw:text-box>
        </draw:frame>
        <draw:frame presentation:style-name="pr48" draw:text-style-name="P42" draw:layer="layout" svg:width="23.5cm" svg:height="1.439cm" svg:x="2cm" svg:y="4.561cm" presentation:class="subtitle" presentation:user-transformed="true">
          <draw:text-box>
            <text:p text:style-name="P15"><text:span text:style-name="T49">https://www.canada.ca/en/employment-social-development/services/sin/receiving-updating</text:span></text:p>
            <text:p text:style-name="P15"><text:span text:style-name="T49">https://idguide.ca/sin</text:span></text:p>
          </draw:text-box>
        </draw:frame>
        <draw:frame presentation:style-name="pr49" draw:text-style-name="P24" draw:layer="layout" svg:width="23.5cm" svg:height="6.376cm" svg:x="2cm" svg:y="6.461cm">
          <draw:text-box>
            <text:p text:style-name="P15"><text:span text:style-name="T50">By law, </text:span><text:span text:style-name="T21">you must update your SIN record when you change your name.</text:span></text:p>
            <text:p text:style-name="P15"><text:span text:style-name="T51"/></text:p>
            <text:p text:style-name="P15"><text:span text:style-name="T50">To do this you will need to </text:span><text:span text:style-name="T21">submit an application either online, by mail, or in person.</text:span></text:p>
            <text:p text:style-name="P15"><text:span text:style-name="T51"/></text:p>
            <text:p text:style-name="P15"><text:span text:style-name="T50">There are several documents required for this process, which may vary greatly depending on your citizenship/residency. I recommend visiting the online portal for the requirement and submission guidelines: https://www.canada.ca/en/employment-social-development/services/sin/apply.html</text:span></text:p>
            <text:p text:style-name="P15"><text:span text:style-name="T51"/></text:p>
            <text:p text:style-name="P15"><text:span text:style-name="T50">If you are updating your sex designation, </text:span><text:span text:style-name="T21">you may now choose an X marker or choose to not declare your gender.</text:span><text:span text:style-name="T50"> Service Canada will add a note to your record with your choice. However, please note that </text:span><text:span text:style-name="T21">they have stated for the last 4+ years that until their computer systems are upgraded to register this information, "male" or "female" will still appear on your SIN record.</text:span></text:p>
          </draw:text-box>
        </draw:frame>
        <anim:par presentation:node-type="timing-root">
          <anim:par smil:begin="id27.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27" presentation:class="page"/>
          <draw:frame presentation:style-name="pr5" draw:text-style-name="P2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xml:id="id28" draw:id="id28">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Canada Revenue Agency</text:span></text:p>
          </draw:text-box>
        </draw:frame>
        <draw:frame presentation:style-name="pr50" draw:text-style-name="P42" draw:layer="layout" svg:width="23.5cm" svg:height="1.804cm" svg:x="2cm" svg:y="4.561cm" presentation:class="subtitle" presentation:user-transformed="true">
          <draw:text-box>
            <text:p text:style-name="P15"><text:span text:style-name="T49">https://www.canada.ca/en/revenue-agency/services/tax/individuals/topics/about-your-tax-return/should-you-tell-cra-about-your-change-name</text:span></text:p>
            <text:p text:style-name="P15"><text:span text:style-name="T49"><text:a xlink:href="https://idguide.ca/cra" xlink:type="simple">https://idguide.ca/cra</text:a></text:span></text:p>
          </draw:text-box>
        </draw:frame>
        <draw:frame presentation:style-name="pr51" draw:text-style-name="P43" draw:layer="layout" svg:width="23.5cm" svg:height="6.339cm" svg:x="2cm" svg:y="6.961cm">
          <draw:text-box>
            <text:p text:style-name="P15"><text:span text:style-name="T52">You are currently able to update your information by phone, mail, or fax.</text:span></text:p>
            <text:p text:style-name="P15"><text:span text:style-name="T52"/></text:p>
            <text:p text:style-name="P15"><text:span text:style-name="T52">You will need to provide the CRA with a letter containing the following:</text:span></text:p>
            <text:list text:style-name="L3">
              <text:list-item>
                <text:p text:style-name="P15"><text:span text:style-name="T52">an original or certified true copy of one of the following documents:</text:span></text:p>
                <text:p text:style-name="P15"><text:span text:style-name="T52">- </text:span><text:span text:style-name="T52"><text:tab/></text:span><text:span text:style-name="T52">a name change certificate from a provincial/territorial vital statistics department</text:span></text:p>
                <text:p text:style-name="P15"><text:span text:style-name="T52">- </text:span><text:span text:style-name="T52"><text:tab/></text:span><text:span text:style-name="T52">a court order issued under an act on change of name</text:span></text:p>
              </text:list-item>
              <text:list-item>
                <text:p text:style-name="P15"><text:span text:style-name="T52">your old and new names</text:span></text:p>
              </text:list-item>
              <text:list-item>
                <text:p text:style-name="P15"><text:span text:style-name="T52">your social insurance number</text:span></text:p>
              </text:list-item>
              <text:list-item>
                <text:p text:style-name="P15"><text:span text:style-name="T52">your signature</text:span></text:p>
              </text:list-item>
            </text:list>
          </draw:text-box>
        </draw:frame>
        <draw:custom-shape draw:style-name="gr9" draw:text-style-name="P22"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28" draw:text-style-name="P28" draw:layer="layout" svg:width="10.1cm" svg:height="2.666cm" svg:x="16.5cm" svg:y="11.413cm">
          <draw:text-box>
            <text:p text:style-name="P9"><text:span text:style-name="T33">For information on the different processes for submission via phone, or mail/fax, I recommend visiting the online portal (link above) for addresses and phone numbers relevant to your area</text:span></text:p>
          </draw:text-box>
        </draw:frame>
        <anim:par presentation:node-type="timing-root">
          <anim:par smil:begin="id28.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28" presentation:class="page"/>
          <draw:frame presentation:style-name="pr5" draw:text-style-name="P2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xml:id="id29" draw:id="id29">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14" draw:layer="layout" svg:width="18.8cm" svg:height="1.772cm" svg:x="1.9cm" svg:y="2.6cm" presentation:class="title" presentation:user-transformed="true">
          <draw:text-box>
            <text:p text:style-name="P7"><text:span text:style-name="T11">Other important updates</text:span></text:p>
          </draw:text-box>
        </draw:frame>
        <draw:frame presentation:style-name="pr52" draw:text-style-name="P43" draw:layer="layout" svg:width="16cm" svg:height="7.669cm" svg:x="2cm" svg:y="4.661cm">
          <draw:text-box>
            <text:p text:style-name="P15"><text:span text:style-name="T52">Once you have legally changed your name, </text:span><text:span text:style-name="T53">remember to update:</text:span></text:p>
            <text:p text:style-name="P15"><text:span text:style-name="T52"/></text:p>
            <text:p text:style-name="P15"><text:span text:style-name="T53">- Elections Canada</text:span></text:p>
            <text:p text:style-name="P15"><text:span text:style-name="T53">- your electricity provider</text:span></text:p>
            <text:p text:style-name="P15"><text:span text:style-name="T53">- your phone provider</text:span></text:p>
            <text:p text:style-name="P15"><text:span text:style-name="T53">- your internet provider</text:span></text:p>
            <text:p text:style-name="P15"><text:span text:style-name="T53">- your bank</text:span></text:p>
            <text:p text:style-name="P15"><text:span text:style-name="T53">- anyone else who may possess your personal information</text:span></text:p>
            <text:p text:style-name="P15"><text:span text:style-name="T52"/></text:p>
            <text:p text:style-name="P15"><text:span text:style-name="T52">All these companies and registries will have different methods of updating your information, but </text:span><text:span text:style-name="T53">generally require a valid Canadian Change of Name Certificate.</text:span></text:p>
          </draw:text-box>
        </draw:frame>
        <draw:frame draw:name="Google Shape;148;p 1" draw:style-name="gr12" draw:text-style-name="P6" draw:layer="layout" svg:width="7.865cm" svg:height="10.729cm" svg:x="19.5cm" svg:y="1cm">
          <draw:image xlink:href="Pictures/10000000000009C4000007FDD57F4ACF.jpg" xlink:type="simple" xlink:show="embed" xlink:actuate="onLoad" draw:mime-type="image/jpeg">
            <text:p/>
          </draw:image>
          <svg:desc>Pastel checklist and pencil</svg:desc>
        </draw:frame>
        <anim:par presentation:node-type="timing-root">
          <anim:par smil:begin="id29.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29" presentation:class="page"/>
          <draw:frame presentation:style-name="pr5" draw:text-style-name="P2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xml:id="id30" draw:id="id30">
        <office:forms form:automatic-focus="false" form:apply-design-mode="false"/>
        <draw:custom-shape draw:style-name="gr8"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6" draw:text-style-name="P44" draw:layer="layout" svg:width="18.8cm" svg:height="1.772cm" svg:x="1.9cm" svg:y="2.4cm" presentation:class="title" presentation:user-transformed="true">
          <draw:text-box>
            <text:p text:style-name="P7"><text:span text:style-name="T54">I.D. Guide and other resources</text:span></text:p>
          </draw:text-box>
        </draw:frame>
        <draw:frame presentation:style-name="pr53" draw:text-style-name="P43" draw:layer="layout" svg:width="18cm" svg:height="8.953cm" svg:x="2cm" svg:y="4.461cm">
          <draw:text-box>
            <text:p text:style-name="P15"><text:span text:style-name="T55">I.D. Guide</text:span></text:p>
            <text:p text:style-name="P15"><text:span text:style-name="T56"><text:a xlink:href="https://idguide.ca/" xlink:type="simple">https://idguide.ca</text:a></text:span></text:p>
            <text:p text:style-name="P15"><text:span text:style-name="T57"/></text:p>
            <text:p text:style-name="P15"><text:span text:style-name="T58">My free, community-driven resource designed to help people navigate legal name, gender marker, and identity document changes in Canada. The site currently provides full support for Ontario and we're working to add more provinces and territories. Please stay tuned for expanded support across Canada.</text:span><text:span text:style-name="T59"><text:line-break/></text:span><text:span text:style-name="T59"/></text:p>
            <text:p text:style-name="P15"><text:span text:style-name="T55">JusticeTrans</text:span></text:p>
            <text:p text:style-name="P15"><text:span text:style-name="T60"><text:a xlink:href="https://justicetrans.org/en/" xlink:type="simple">https://justicetrans.org/en/</text:a></text:span></text:p>
            <text:p text:style-name="P15"><text:span text:style-name="T61"/></text:p>
            <text:p text:style-name="P15"><text:span text:style-name="T30">An organization founded by trans people for trans people providing accessible legal education by challenging transphobic policy and advocating for <text:s/>social justice. They have province/territory-specific &amp; nation-wide resources including information on name changes and gender marker updates, and legal advice for trans people dealing with housing, policing, and employment inequalities.</text:span></text:p>
          </draw:text-box>
        </draw:frame>
        <draw:frame draw:name="Google Shape;159;p 1" draw:style-name="gr14" draw:text-style-name="P6" draw:layer="layout" svg:width="6.58cm" svg:height="11.865cm" svg:x="20.92cm" svg:y="0.636cm">
          <draw:image xlink:href="Pictures/10000000000009C4000006852401EA8E.jpg" xlink:type="simple" xlink:show="embed" xlink:actuate="onLoad" draw:mime-type="image/jpeg">
            <text:p/>
          </draw:image>
          <svg:desc>Sealed paper scrolls</svg:desc>
        </draw:frame>
        <anim:par presentation:node-type="timing-root">
          <anim:par smil:begin="id30.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30" presentation:class="page"/>
          <draw:frame presentation:style-name="pr5" draw:text-style-name="P2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xml:id="id31" draw:id="id31">
        <office:forms form:automatic-focus="false" form:apply-design-mode="false"/>
        <draw:custom-shape draw:style-name="gr29" draw:text-style-name="P1" draw:layer="layout" svg:width="26.5cm" svg:height="7.5cm" svg:x="0.8cm" svg:y="4.1cm">
          <text:p/>
          <draw:enhanced-geometry svg:viewBox="0 0 21600 21600" draw:mirror-horizontal="false" draw:mirror-vertical="false" draw:type="rectangle" draw:enhanced-path="M 0 0 L 21600 0 21600 21600 0 21600 0 0 Z N"/>
        </draw:custom-shape>
        <draw:frame presentation:style-name="pr54" draw:text-style-name="P45" draw:layer="layout" svg:width="25.5cm" svg:height="6.168cm" svg:x="1.3cm" svg:y="4.803cm" presentation:class="subtitle" presentation:user-transformed="true">
          <draw:text-box>
            <text:p text:style-name="P4"><text:span text:style-name="T62">This workshop was written and presented by </text:span><text:span text:style-name="T63">Dana Rosamund Teagle</text:span><text:span text:style-name="T64">. You can get in touch with her via email at </text:span><text:span text:style-name="T65"><text:a xlink:href="mailto:contact@idguide.ca" xlink:type="simple">contact@idguide.ca</text:a></text:span><text:span text:style-name="T66">.</text:span></text:p>
            <text:p text:style-name="P4"><text:span text:style-name="T64"/></text:p>
            <text:p text:style-name="P4"><text:span text:style-name="T64">Please reach out if you have any questions or concerns about the materials presented today, and good luck with getting your IDs updated!</text:span></text:p>
            <text:p text:style-name="P4"><text:span text:style-name="T64"/></text:p>
            <text:p text:style-name="P4"><text:span text:style-name="T67">Slides and documents are available for download at </text:span><text:span text:style-name="T68"><text:a xlink:href="https://idguide.ca/" xlink:type="simple">https://idguide.ca</text:a></text:span><text:span text:style-name="T69">.</text:span></text:p>
          </draw:text-box>
        </draw:frame>
        <anim:par presentation:node-type="timing-root">
          <anim:par smil:begin="id31.begin">
            <anim:transitionFilter smil:dur="2s" smil:type="miscShapeWipe" smil:subtype="across"/>
          </anim:par>
          <anim:seq smil:dur="0s" presentation:node-type="main-sequence"/>
        </anim:par>
        <presentation:notes draw:style-name="dp2">
          <draw:page-thumbnail draw:style-name="gr7" draw:layer="layout" svg:width="18.624cm" svg:height="10.476cm" svg:x="1.482cm" svg:y="2.123cm" draw:page-number="31" presentation:class="page"/>
          <draw:frame presentation:style-name="pr5" draw:text-style-name="P2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Franklin Gothic Medium" svg:font-family="'Franklin Gothic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Screenshot_25_202026-02-22_25_20103454" draw:display-name="Screenshot%202026-02-22%20103454" xlink:href="Pictures/100000010000077F000003712F9B74B6.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opacity="90%" draw:textarea-horizontal-align="justify" fo:padding-top="0.125cm" fo:padding-bottom="0.125cm" fo:padding-left="0.25cm" fo:padding-right="0.25cm" fo:wrap-option="wrap" draw:shadow="hidden" draw:shadow-offset-x="0.2cm" draw:shadow-offset-y="0.2cm" draw:shadow-color="#808080" draw:shadow-opacity="9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solid" svg:stroke-color="#000000"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08T14:31:16.014000000</meta:creation-date>
    <dc:date>2026-02-23T09:32:34.700006200</dc:date>
    <meta:editing-duration>PT46M13S</meta:editing-duration>
    <meta:editing-cycles>10</meta:editing-cycles>
    <meta:generator>LibreOffice/25.2.7.2$Windows_X86_64 LibreOffice_project/5cbfd1ab6520636bb5f7b99185aa69bd7456825d</meta:generator>
    <meta:print-date>2025-04-09T12:54:23.101000000</meta:print-date>
    <meta:printed-by>PDF files</meta:printed-by>
    <meta:document-statistic meta:object-count="244"/>
  </office:meta>
</office:document-meta>
</file>